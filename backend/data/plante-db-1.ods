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1cm"/>
    </style:style>
    <style:style style:name="co2"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69cm" fo:break-before="auto" style:use-optimal-row-height="true"/>
    </style:style>
    <style:style style:name="ro3" style:family="table-row">
      <style:table-row-properties style:row-height="1.109cm" fo:break-before="auto" style:use-optimal-row-height="true"/>
    </style:style>
    <style:style style:name="ro4" style:family="table-row">
      <style:table-row-properties style:row-height="2.178cm" fo:break-before="auto" style:use-optimal-row-height="true"/>
    </style:style>
    <style:style style:name="ro5" style:family="table-row">
      <style:table-row-properties style:row-height="1.822cm" fo:break-before="auto" style:use-optimal-row-height="true"/>
    </style:style>
    <style:style style:name="ro6" style:family="table-row">
      <style:table-row-properties style:row-height="1.466cm" fo:break-before="auto" style:use-optimal-row-height="true"/>
    </style:style>
    <style:style style:name="ro7" style:family="table-row">
      <style:table-row-properties style:row-height="0.751cm" fo:break-before="auto" style:use-optimal-row-height="true"/>
    </style:style>
    <style:style style:name="ro8" style:family="table-row">
      <style:table-row-properties style:row-height="3.24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088cm solid #ffffff"/>
      <style:text-properties fo:color="#000000" style:text-outline="false" style:text-line-through-styl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5.09999990463257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ffffff" fo:border="0.088cm solid #ffffff"/>
      <style:text-properties fo:color="#000000" style:text-outline="false" style:text-line-through-style="none" style:font-name="Arial1" fo:font-size="9pt" fo:language="en" fo:country="US" fo:font-style="italic" fo:text-shadow="none" style:text-underline-style="none" fo:font-weight="bold" style:text-underline-mode="continuous" style:text-overline-mode="continuous" style:text-line-through-mode="continuous" style:font-size-asian="9pt" style:language-asian="en" style:country-asian="US" style:font-style-asian="italic" style:font-weight-asian="bold" style:font-size-complex="5.09999990463257pt" style:language-complex="en" style:country-complex="US" style:font-style-complex="italic" style:font-weight-complex="bold" style:text-emphasize="none" style:font-relief="none" style:text-overline-style="none" style:text-overline-color="font-color"/>
    </style:style>
    <style:style style:name="ce3" style:family="table-cell" style:parent-style-name="Default">
      <style:table-cell-properties fo:background-color="#ffffff" fo:border="0.088cm solid #ffffff"/>
      <style:text-properties fo:color="#000000" style:text-outline="false" style:text-line-through-style="none" style:font-name="Arial1" fo:font-size="9pt" fo:language="en" fo:country="US" fo:text-shadow="none" style:text-underline-style="none" fo:font-weight="bold" style:text-underline-mode="continuous" style:text-overline-mode="continuous" style:text-line-through-mode="continuous" style:font-size-asian="9pt" style:language-asian="en" style:country-asian="US" style:font-weight-asian="bold" style:font-size-complex="5.09999990463257pt" style:language-complex="en" style:country-complex="US" style:font-weight-complex="bold" style:text-emphasize="none" style:font-relief="none" style:text-overline-style="none" style:text-overline-color="font-color"/>
    </style:style>
    <style:style style:name="ce4" style:family="table-cell" style:parent-style-name="Default">
      <style:table-cell-properties fo:background-color="#ffffff" fo:border="0.088cm solid #ffffff"/>
      <style:text-properties fo:color="#000000" style:text-outline="false" style:text-line-through-style="none" style:font-name="Arial1"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cc00" fo:border="0.088cm solid #ffffff"/>
      <style:text-properties fo:color="#000000" style:text-outline="false" style:text-line-through-styl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5.09999990463257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order-bottom="0.002cm solid #99ccff" fo:background-color="#ccffff" fo:border-left="none" fo:border-right="none" fo:border-top="0.002cm solid #99ccff"/>
      <style:text-properties fo:color="#000000" style:text-outline="false" style:text-line-through-style="none" style:font-name="Calibri"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02cm solid #99ccff" fo:border-left="none" fo:border-right="none" fo:border-top="0.002cm solid #99ccff"/>
      <style:text-properties fo:color="#000000" style:text-outline="false" style:text-line-through-style="none" style:font-name="Calibri"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02cm solid #99ccff" fo:background-color="#ccffff" fo:border-left="none" fo:border-right="none" fo:border-top="0.002cm solid #99ccff"/>
      <style:text-properties fo:color="#000000"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02cm solid #99ccff" fo:border-left="none" fo:border-right="none" fo:border-top="0.002cm solid #99ccff"/>
      <style:text-properties fo:color="#000000"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88cm solid #ffffff" fo:border-left="none" fo:border-right="none" fo:border-top="0.002cm solid #99ccff"/>
      <style:text-properties fo:color="#000000"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88cm solid #ffffff" fo:background-color="#ffffff" fo:border-left="0.088cm solid #ffffff" fo:border-right="none" fo:border-top="0.088cm solid #ffffff"/>
      <style:text-properties fo:color="#000000" style:text-outline="false" style:text-line-through-style="none" style:font-name="Arial1"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02cm solid #99ccff" fo:background-color="#ffffff" fo:border-left="0.035cm solid #ffffff" fo:border-right="0.035cm solid #ffffff" fo:border-top="0.035cm solid #ffffff"/>
      <style:text-properties fo:color="#000000" style:text-outline="false" style:text-line-through-style="none" style:font-name="Arial1"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88cm solid #ffffff" fo:background-color="#ffffff" fo:border-left="0.088cm solid #ffffff" fo:border-right="0.088cm solid #ffffff" fo:border-top="0.002cm solid #99ccff"/>
      <style:text-properties fo:color="#000000" style:text-outline="false" style:text-line-through-style="none" style:font-name="Arial1"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88cm solid #ffffff" fo:background-color="#ffffff" fo:border-left="none" fo:border-right="0.088cm solid #ffffff" fo:border-top="0.088cm solid #ffffff"/>
      <style:text-properties fo:color="#000000" style:text-outline="false" style:text-line-through-style="none" style:font-name="Arial1"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ffff" fo:border="0.088cm solid #ffffff"/>
      <style:text-properties fo:color="#000000" style:text-outline="false" style:text-line-through-style="none" style:font-name="Arial1" fo:font-size="9pt"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5.09999990463257pt" style:language-complex="en" style:country-complex="US" style:font-style-complex="normal" style:text-emphasize="none" style:font-relief="none" style:text-overline-style="none" style:text-overline-color="font-color"/>
    </style:style>
    <style:style style:name="ce16" style:family="table-cell" style:parent-style-name="Default">
      <style:table-cell-properties fo:background-color="#ffffff" fo:border="0.088cm solid #ffffff"/>
      <style:text-properties fo:color="#000000" style:text-outline="false" style:text-line-through-style="none" style:font-name="Arial1" fo:font-size="9pt" fo:language="en" fo:country="US" fo:font-style="normal" fo:text-shadow="none" style:text-underline-mode="continuous" style:text-overline-mode="continuous" style:text-line-through-mode="continuous" style:font-size-asian="9pt" style:language-asian="en" style:country-asian="US" style:font-style-asian="normal" style:font-size-complex="5.09999990463257pt" style:language-complex="en" style:country-complex="US" style:font-style-complex="normal" style:text-emphasize="none" style:font-relief="none" style:text-overline-style="none" style:text-overline-color="font-color"/>
    </style:style>
    <style:style style:name="T1" style:family="text">
      <style:text-properties fo:color="#000000" style:font-name="Arial1" fo:font-size="9pt" fo:font-style="italic" fo:font-weight="bold" style:font-name-asian="Arial1" style:font-size-asian="9pt" style:font-style-asian="italic" style:font-weight-asian="bold" style:font-name-complex="Arial1" style:font-size-complex="5.09999990463257pt" style:font-style-complex="italic" style:font-weight-complex="bold"/>
    </style:style>
    <style:style style:name="T2" style:family="text">
      <style:text-properties fo:color="#000000" style:font-name="Arial1" fo:font-size="9pt" fo:font-style="normal" fo:font-weight="bold" style:font-name-asian="Arial1" style:font-size-asian="9pt" style:font-style-asian="normal" style:font-weight-asian="bold" style:font-name-complex="Arial1" style:font-size-complex="5.09999990463257pt" style:font-style-complex="normal" style:font-weight-complex="bold"/>
    </style:style>
    <style:style style:name="T3" style:family="text">
      <style:text-properties fo:color="#000000" style:font-name="Arial1" fo:font-size="9pt" fo:font-style="italic" style:text-underline-style="none" fo:font-weight="bold" style:font-name-asian="Arial1" style:font-size-asian="9pt" style:font-style-asian="italic" style:font-weight-asian="bold" style:font-name-complex="Arial1" style:font-size-complex="5.09999990463257pt" style:font-style-complex="italic" style:font-weight-complex="bold"/>
    </style:style>
    <style:style style:name="T4" style:family="text">
      <style:text-properties fo:color="#000000" style:font-name="Arial1" fo:font-size="9pt" fo:font-style="normal" style:text-underline-style="none" fo:font-weight="bold" style:font-name-asian="Arial1" style:font-size-asian="9pt" style:font-style-asian="normal" style:font-weight-asian="bold" style:font-name-complex="Arial1" style:font-size-complex="5.09999990463257pt" style:font-style-complex="normal" style:font-weight-complex="bold"/>
    </style:style>
    <style:style style:name="T5" style:family="text">
      <style:text-properties fo:color="#000000" style:font-name="Arial1" fo:font-size="9pt" fo:font-style="normal" style:text-underline-style="none" fo:font-weight="normal" style:font-name-asian="Arial1" style:font-size-asian="9pt" style:font-style-asian="normal" style:font-weight-asian="normal" style:font-name-complex="Arial1" style:font-size-complex="5.09999990463257pt" style:font-style-complex="normal" style:font-weight-complex="normal"/>
    </style:style>
    <style:style style:name="T6" style:family="text">
      <style:text-properties fo:color="#000000" style:font-name="Arial1" fo:font-size="9pt" fo:font-style="normal" style:text-underline-style="solid" style:text-underline-width="auto" style:text-underline-color="font-color" fo:font-weight="bold" style:font-name-asian="Arial1" style:font-size-asian="9pt" style:font-style-asian="normal" style:font-weight-asian="bold" style:font-name-complex="Arial1" style:font-size-complex="5.09999990463257pt" style:font-style-complex="normal" style:font-weight-complex="bold"/>
    </style:style>
  </office:automatic-styles>
  <office:body>
    <office:spreadsheet>
      <table:table table:name="Feuille1" table:style-name="ta1" table:print="false">
        <table:table-column table:style-name="co1" table:default-cell-style-name="ce3"/>
        <table:table-column table:style-name="co2" table:default-cell-style-name="ce4"/>
        <table:table-column table:style-name="co2" table:number-columns-repeated="4" table:default-cell-style-name="ce8"/>
        <table:table-column table:style-name="co2" table:number-columns-repeated="5" table:default-cell-style-name="ce4"/>
        <table:table-row table:style-name="ro1">
          <table:table-cell table:style-name="ce1" office:value-type="string">
            <text:p>nom_scientifique</text:p>
          </table:table-cell>
          <table:table-cell table:style-name="ce1" office:value-type="string">
            <text:p>nom_vernaculaire</text:p>
          </table:table-cell>
          <table:table-cell table:style-name="ce5" office:value-type="string">
            <text:p>famille</text:p>
          </table:table-cell>
          <table:table-cell table:style-name="ce5" office:value-type="string">
            <text:p>methode_consommation</text:p>
          </table:table-cell>
          <table:table-cell table:style-name="ce5" office:value-type="string">
            <text:p>proprietes_principales</text:p>
          </table:table-cell>
          <table:table-cell table:style-name="ce5" office:value-type="string">
            <text:p>resolution_probleme</text:p>
          </table:table-cell>
          <table:table-cell table:style-name="ce1" office:value-type="string">
            <text:p>parties_comestibles</text:p>
          </table:table-cell>
          <table:table-cell table:style-name="ce1" office:value-type="string">
            <text:p>contre_indications</text:p>
          </table:table-cell>
          <table:table-cell table:style-name="ce1" office:value-type="string">
            <text:p>interactions_medicamenteuses</text:p>
          </table:table-cell>
          <table:table-cell table:style-name="ce1" office:value-type="string">
            <text:p>contre_indication_femmes_enceintes</text:p>
          </table:table-cell>
          <table:table-cell table:style-name="ce1" office:value-type="string">
            <text:p>contre_indication_enfant</text:p>
          </table:table-cell>
        </table:table-row>
        <table:table-row table:style-name="ro2">
          <table:table-cell table:style-name="ce2" office:value-type="string">
            <text:p>Achillea millefolium L.</text:p>
          </table:table-cell>
          <table:table-cell office:value-type="string">
            <text:p>Achillée millefeuille</text:p>
          </table:table-cell>
          <table:table-cell table:style-name="ce6" office:value-type="string">
            <text:p>Asteraceae</text:p>
          </table:table-cell>
          <table:table-cell table:style-name="ce4" office:value-type="string">
            <text:p>infusion (feuilles et fleurs séchées), décoction, teinture mère, usage externe (compresses, bains, cataplasmes), huile ou macérat pour application cutanée</text:p>
          </table:table-cell>
          <table:table-cell table:style-name="ce6" office:value-type="string">
            <text:p>anti-inflammatoire, antispasmodique, hémostatique, digestive, fébrifuge, cicatrisante</text:p>
          </table:table-cell>
          <table:table-cell table:style-name="ce6" office:value-type="string">
            <text:p>troubles digestifs (ballonnements, crampes, digestion lente), règles douloureuses ou irrégulières, petites plaies et saignements superficiels, inflammations de la peau, fièvre légère et états grippaux, spasmes intestinaux</text:p>
          </table:table-cell>
          <table:table-cell office:value-type="string">
            <text:p>Parties aériennes</text:p>
          </table:table-cell>
          <table:table-cell office:value-type="string">
            <text:p>En cas d’allergie croisée connue, en particulier aux plantes de la famille des Asteraceae ne pas consommer un CA contenant une préparation à base de cette partie de plante. </text:p>
          </table:table-cell>
          <table:table-cell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2">
          <table:table-cell table:style-name="ce2" office:value-type="string">
            <text:p>Actaea racemosa L. (syn. Cimicifuga racemosa (L.) Nutt.)</text:p>
          </table:table-cell>
          <table:table-cell office:value-type="string">
            <text:p>Actée à grappes, Cimicaire à grappes</text:p>
          </table:table-cell>
          <table:table-cell table:style-name="ce7" office:value-type="string">
            <text:p>Ranunculaceae</text:p>
          </table:table-cell>
          <table:table-cell table:style-name="ce7" office:value-type="string">
            <text:p>infusion (racine séchée), décoction, teinture mère, extrait standardisé, gélules</text:p>
          </table:table-cell>
          <table:table-cell table:style-name="ce7" office:value-type="string">
            <text:p>antispasmodique, anti-inflammatoire, sédative légère, régulatrice hormonale, analgésique</text:p>
          </table:table-cell>
          <table:table-cell table:style-name="ce7" office:value-type="string">
            <text:p>troubles de la ménopause (bouffées de chaleur, sueurs nocturnes), troubles menstruels, douleurs menstruelles, tensions nerveuses, douleurs musculaires et articulaires, troubles du sommeil liés aux déséquilibres hormonaux</text:p>
          </table:table-cell>
          <table:table-cell office:value-type="string">
            <text:p>Rhizome, racine</text:p>
          </table:table-cell>
          <table:table-cell office:value-type="string">
            <text:p>En cas de de cancer hormono-dépendant, d'affection billaire ou hépatique ne pas consommer un CA contenant une préparation à base de cette partie de plante.</text:p>
          </table:table-cell>
          <table:table-cell office:value-type="string">
            <text:p>Interactions avec les traitements hormonaux oestro-progestatifs et les anti-oestrogènes (par exemple le tamoxifène). </text:p>
          </table:table-cell>
          <table:table-cell office:value-type="string">
            <text:p>Chez la femme enceinte ou allaitante, contre-indication de consommer un CA contenant une préparation à base de cette plante. En raison des interactions médicamenteuses démontrées, augmentant le risque de grossesse non désirée, les femmes en âge de procréer doivent éviter de consommer un CA contenant une préparation à base de cette partie de plante</text:p>
          </table:table-cell>
          <table:table-cell office:value-type="string">
            <text:p>En l’absence de données, avant l’âge de 18 ans, éviter de consommer un CA contenant une préparation à base de cette partie de plante. Réservé à l’adulte. </text:p>
          </table:table-cell>
        </table:table-row>
        <table:table-row table:style-name="ro2">
          <table:table-cell table:style-name="ce2" office:value-type="string">
            <text:p>Aesculus hippocastanum L.</text:p>
          </table:table-cell>
          <table:table-cell office:value-type="string">
            <text:p>Marronnier d'Inde</text:p>
          </table:table-cell>
          <table:table-cell table:style-name="ce6" office:value-type="string">
            <text:p>Sapindaceae</text:p>
          </table:table-cell>
          <table:table-cell table:style-name="ce6" office:value-type="string">
            <text:p>extrait standardisé, teinture mère, gélules, usage externe (gel, crème, pommade), décoction pour usage externe</text:p>
          </table:table-cell>
          <table:table-cell table:style-name="ce6" office:value-type="string">
            <text:p>veinotonique, vasoprotectrice, anti-inflammatoire, anti-œdémateuse, astringente</text:p>
          </table:table-cell>
          <table:table-cell table:style-name="ce6" office:value-type="string">
            <text:p>insuffisance veineuse, jambes lourdes, varices, hémorroïdes, œdèmes, troubles circulatoires périphériques</text:p>
          </table:table-cell>
          <table:table-cell office:value-type="string">
            <text:p>Graine, bourgeon de feuille, écorce</text:p>
          </table:table-cell>
          <table:table-cell office:value-type="string">
            <text:p>-</text:p>
          </table:table-cell>
          <table:table-cell table:style-name="ce2" office:value-type="string">
            <text:p>-</text:p>
          </table:table-cell>
          <table:table-cell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2">
          <table:table-cell office:value-type="string">
            <text:p><text:span text:style-name="T1">Agrimonia eupatoria </text:span><text:span text:style-name="T2">L.</text:span></text:p>
          </table:table-cell>
          <table:table-cell office:value-type="string">
            <text:p>Aigremoine eupatoire</text:p>
          </table:table-cell>
          <table:table-cell table:style-name="ce7" office:value-type="string">
            <text:p>Rosaceae</text:p>
          </table:table-cell>
          <table:table-cell table:style-name="ce7" office:value-type="string">
            <text:p>infusion (parties aériennes fleuries), décoction, teinture mère, usage externe (bains de bouche, compresses, gargarismes)</text:p>
          </table:table-cell>
          <table:table-cell table:style-name="ce7" office:value-type="string">
            <text:p>astringente, anti-inflammatoire, digestive, cholérétique, cicatrisante</text:p>
          </table:table-cell>
          <table:table-cell table:style-name="ce7" office:value-type="string">
            <text:p>troubles digestifs légers (diarrhée, ballonnements), inflammations de la bouche et de la gorge, troubles hépato-biliaires légers, plaies superficielles, irritations cutanées</text:p>
          </table:table-cell>
          <table:table-cell office:value-type="string">
            <text:p>Parties aériennes</text:p>
          </table:table-cell>
          <table:table-cell office:value-type="string">
            <text:p>-</text:p>
          </table:table-cell>
          <table:table-cell table:style-name="ce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2">
          <table:table-cell office:value-type="string">
            <text:p><text:span text:style-name="T1">Allium sativum </text:span><text:span text:style-name="T2">L.</text:span></text:p>
          </table:table-cell>
          <table:table-cell office:value-type="string">
            <text:p>Ail</text:p>
          </table:table-cell>
          <table:table-cell table:style-name="ce6" office:value-type="string">
            <text:p>Amaryllidaceae</text:p>
          </table:table-cell>
          <table:table-cell table:style-name="ce4" office:value-type="string">
            <text:p>cru, cuit, infusion, macérat, teinture mère, extrait standardisé, gélules</text:p>
          </table:table-cell>
          <table:table-cell table:style-name="ce4" office:value-type="string">
            <text:p>antibactérienne, antivirale, antifongique, hypotensive, hypolipidémiante, antioxydante</text:p>
          </table:table-cell>
          <table:table-cell table:style-name="ce6" office:value-type="string">
            <text:p>infections bactériennes et virales, hypertension légère, excès de cholestérol, troubles circulatoires, affaiblissement du système immunitaire, prévention cardiovasculaire</text:p>
          </table:table-cell>
          <table:table-cell office:value-type="string">
            <text:p>Bulbe</text:p>
          </table:table-cell>
          <table:table-cell office:value-type="string">
            <text:p>En cas de traitement concomitant par un médicament anti-rétroviral (saquinavir,ritonavir,…), la consommation d’un CA contenant une préparation à base de cette partie de plante est contre-indiquée.</text:p>
          </table:table-cell>
          <table:table-cell office:value-type="string">
            <text:p>En cas de traitement concomitant par un médicament anticoagulant ou antiagrégant plaquettaire, ne pas consommer un CA contenant une préparation à base de cette partie de plante.</text:p>
          </table:table-cell>
          <table:table-cell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3">
          <table:table-cell office:value-type="string">
            <text:p><text:span text:style-name="T1">Aloe vera </text:span><text:span text:style-name="T2">(L.) Burm. f. </text:span><text:span text:style-name="T1">(syn. Aloe barbadensis </text:span><text:span text:style-name="T2">Mill.</text:span><text:span text:style-name="T1">)</text:span></text:p>
          </table:table-cell>
          <table:table-cell office:value-type="string">
            <text:p>Aloès</text:p>
          </table:table-cell>
          <table:table-cell table:style-name="ce7" office:value-type="string">
            <text:p>Asphodelaceae</text:p>
          </table:table-cell>
          <table:table-cell table:style-name="ce7" office:value-type="string">
            <text:p>gel interne purifié, jus stabilisé, usage externe (gel, crème, cataplasme), gélules</text:p>
          </table:table-cell>
          <table:table-cell table:style-name="ce7" office:value-type="string">
            <text:p>cicatrisante, hydratante, anti-inflammatoire, immunostimulante, laxative douce (latex), antiseptique</text:p>
          </table:table-cell>
          <table:table-cell table:style-name="ce7" office:value-type="string">
            <text:p>brûlures et coups de soleil, irritations et lésions cutanées, troubles digestifs, constipation occasionnelle, inflammations gastro-intestinales, soutien du système immunitaire</text:p>
          </table:table-cell>
          <table:table-cell office:value-type="string">
            <text:p>Feuille, gel, latex (jus)</text:p>
          </table:table-cell>
          <table:table-cell office:value-type="string">
            <text:p>En cas d’occlusion intestinale, de maladie inflammatoire intestinale aigüe ou chronique, de douleurs abdominales d’origine inexpliqué, de déshydratation sévère ou d’hypokaliémie, ne pas consommer de CA contenant une préparation à base de cette partie de plante.</text:p>
          </table:table-cell>
          <table:table-cell office:value-type="string">
            <text:p>Par son effet sur la kaliémie :</text:p>
            <text:p>* Potentialisation de l’effet des médicaments diurétiques sur la kaliémie ;</text:p>
            <text:p>* Interférence avec les médicaments anti-arythmiques.</text:p>
          </table:table-cell>
          <table:table-cell office:value-type="string">
            <text:p>En raison de la présence de dérivés hydroxyanthracéniques, chez la femme enceinte ou allaitante, la consommation de CA contenant une préparation à base de cette partie de plante est formellement contre-indiquée</text:p>
          </table:table-cell>
          <table:table-cell office:value-type="string">
            <text:p>En raison de la présence de dérivés hydroxyanthracéniques, avant l’âge de 12 ans, la consommation de CA contenant une préparation à base de cette partie de plante est formellement contre-indiquée </text:p>
          </table:table-cell>
        </table:table-row>
        <table:table-row table:style-name="ro4">
          <table:table-cell office:value-type="string">
            <text:p><text:span text:style-name="T1">Althaea officinalis </text:span><text:span text:style-name="T2">L.</text:span></text:p>
          </table:table-cell>
          <table:table-cell office:value-type="string">
            <text:p>Guimauve officinale, Mauve blanche, Bourbon de Saint-Jacques</text:p>
          </table:table-cell>
          <table:table-cell office:value-type="string">
            <text:p>Malvaceae</text:p>
          </table:table-cell>
          <table:table-cell office:value-type="string">
            <text:p>infusion, décoction, sirop</text:p>
          </table:table-cell>
          <table:table-cell office:value-type="string">
            <text:p>émolliente, adoucissante, anti-inflammatoire</text:p>
          </table:table-cell>
          <table:table-cell office:value-type="string">
            <text:p>irritations digestives, toux sèche, inflammations des muqueuses</text:p>
          </table:table-cell>
          <table:table-cell office:value-type="string">
            <text:p>Feuille, racine, fleur</text:p>
          </table:table-cell>
          <table:table-cell office:value-type="string">
            <text:p>-</text:p>
          </table:table-cell>
          <table:table-cell office:value-type="string">
            <text:p>En cas de traitement médicamenteux concomitant, consommer le CA contenant cette plante à distance de médicaments (au moins 60 minutes d’intervalle).</text:p>
          </table:table-cell>
          <table:table-cell office:value-type="string">
            <text:p>En l’absence de données chez la femme enceinte ou allaitante, éviter de consommer un complément alimentaire contenant une préparation à base de cette partie de plante</text:p>
          </table:table-cell>
          <table:table-cell table:style-name="ce15" office:value-type="string">
            <text:p>Par précaution, avant l’âge de 3 ans, éviter de consommer un CA contenant une préparation à base de cette partie de plante. </text:p>
            <text:p>A partir de 3 ans : <text:s/></text:p>
            <text:p><text:span text:style-name="T4">Extraits aqueux uniquement </text:span><text:span text:style-name="T5">:</text:span></text:p>
            <text:p>• 3-5 ans : max 3 g/j équivalent plante sèche. </text:p>
            <text:p>• 6-12 ans: max 4,5 g/j équivalent plante sèche.</text:p>
            <text:p/>
          </table:table-cell>
        </table:table-row>
        <table:table-row table:style-name="ro1">
          <table:table-cell office:value-type="string">
            <text:p><text:span text:style-name="T3">Arctium lappa </text:span><text:span text:style-name="T4">L.</text:span></text:p>
          </table:table-cell>
          <table:table-cell office:value-type="string">
            <text:p>Grande bardane</text:p>
          </table:table-cell>
          <table:table-cell table:style-name="ce9" office:value-type="string">
            <text:p>Asteraceae</text:p>
          </table:table-cell>
          <table:table-cell table:style-name="ce9" office:value-type="string">
            <text:p>décoction, infusion, teinture mère</text:p>
          </table:table-cell>
          <table:table-cell table:style-name="ce9" office:value-type="string">
            <text:p>dépurative, diurétique, antiseptique</text:p>
          </table:table-cell>
          <table:table-cell table:style-name="ce9" office:value-type="string">
            <text:p>affections cutanées, troubles hépatiques, élimination des toxines</text:p>
          </table:table-cell>
          <table:table-cell office:value-type="string">
            <text:p>Toutes parties</text:p>
          </table:table-cell>
          <table:table-cell office:value-type="string">
            <text:p><text:s/>En cas d'allergie croisée connue (en particulier aux plantes de la famille des Asteraceaes, ne pas consommer un CA contenant cette plante. </text:p>
          </table:table-cell>
          <table:table-cell office:value-type="string">
            <text:p>En cas de traitement concomitant par un médicament diurétique, éviter de consommer un CA contenant cette plante. Demander conseil à un pharmacien.</text:p>
          </table:table-cell>
          <table:table-cell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Artemisia absinthium </text:span><text:span text:style-name="T4">L.</text:span></text:p>
          </table:table-cell>
          <table:table-cell office:value-type="string">
            <text:p>Absinthe</text:p>
          </table:table-cell>
          <table:table-cell office:value-type="string">
            <text:p>Asteraceae</text:p>
          </table:table-cell>
          <table:table-cell office:value-type="string">
            <text:p>infusion, teinture mère</text:p>
          </table:table-cell>
          <table:table-cell office:value-type="string">
            <text:p>tonique amère, digestive, vermifuge</text:p>
          </table:table-cell>
          <table:table-cell office:value-type="string">
            <text:p>digestion difficile, manque d’appétit</text:p>
          </table:table-cell>
          <table:table-cell office:value-type="string">
            <text:p>Non précisée (DGCCRF, 2019) </text:p>
          </table:table-cell>
          <table:table-cell office:value-type="string">
            <text:p>En cas de pathologie biliaire ou hépatique, ne pas consommer un CA contenant une préparation à base de cette partie de plante. En cas d'allergie croisée connue (en particulier à la famille des Asteraceae), ne pas consommer un produit contenant cette plante</text:p>
          </table:table-cell>
          <table:table-cell table:style-name="ce2" office:value-type="string">
            <text:p>-</text:p>
          </table:table-cell>
          <table:table-cell office:value-type="string">
            <text:p>En raison des données expérimentales toxicologiques, chez la femme enceinte ou allaitante, contre-indication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Avena sativa </text:span><text:span text:style-name="T4">L.</text:span></text:p>
          </table:table-cell>
          <table:table-cell office:value-type="string">
            <text:p>Avoine cultivée, Avoine</text:p>
          </table:table-cell>
          <table:table-cell table:style-name="ce9" office:value-type="string">
            <text:p>Poaceae</text:p>
          </table:table-cell>
          <table:table-cell table:style-name="ce9" office:value-type="string">
            <text:p>infusion, extrait, gélules</text:p>
          </table:table-cell>
          <table:table-cell table:style-name="ce9" office:value-type="string">
            <text:p>reminéralisante, calmante, nutritive</text:p>
          </table:table-cell>
          <table:table-cell table:style-name="ce9" office:value-type="string">
            <text:p>fatigue nerveuse, convalescence</text:p>
          </table:table-cell>
          <table:table-cell office:value-type="string">
            <text:p>Grain</text:p>
          </table:table-cell>
          <table:table-cell office:value-type="string">
            <text:p>-</text:p>
          </table:table-cell>
          <table:table-cell table:style-name="ce2" office:value-type="string">
            <text:p>-</text:p>
          </table:table-cell>
          <table:table-cell table:number-columns-repeated="2" office:value-type="string">
            <text:p>-</text:p>
          </table:table-cell>
        </table:table-row>
        <table:table-row table:style-name="ro1">
          <table:table-cell office:value-type="string">
            <text:p><text:span text:style-name="T3">Betula pendula </text:span><text:span text:style-name="T4">Roth</text:span><text:span text:style-name="T3"> et Betula pubescens </text:span><text:span text:style-name="T4">Ehrh.</text:span></text:p>
          </table:table-cell>
          <table:table-cell office:value-type="string">
            <text:p>Bouleau verruqueux, Bouleau blanc , et Bouleau pubescent, Bouleau des marais, Bouleau blanc</text:p>
          </table:table-cell>
          <table:table-cell office:value-type="string">
            <text:p>Betulaceae</text:p>
          </table:table-cell>
          <table:table-cell office:value-type="string">
            <text:p>infusion, décoction, extrait</text:p>
          </table:table-cell>
          <table:table-cell office:value-type="string">
            <text:p>diurétique, dépurative, anti-inflammatoire</text:p>
          </table:table-cell>
          <table:table-cell office:value-type="string">
            <text:p>drainage rénal, rhumatismes</text:p>
          </table:table-cell>
          <table:table-cell office:value-type="string">
            <text:p>Feuille, écorce, bourgeon, sève</text:p>
          </table:table-cell>
          <table:table-cell office:value-type="string">
            <text:p>En cas d’insuffisance cardiaque ou rénale, ne pas consommer un CA contenant une préparation à base de cette partie de plante. En cas d’allergie aux dérivés salicylés et d’intolérance aux anti-inflammatoires non-stéroïdiens, ne pas consommer un CA contenant une préparation à base de cette partie de plante.</text:p>
          </table:table-cell>
          <table:table-cell office:value-type="string">
            <text:p>En cas de traitement concomitant par un médicament anti-diurétique, éviter de consommer un CA contenant une préparation à base de cette partie de plante. Demander conseil à un pharmacien.</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1">
          <table:table-cell office:value-type="string">
            <text:p><text:span text:style-name="T3">Calendula officinalis </text:span><text:span text:style-name="T4">L.</text:span></text:p>
          </table:table-cell>
          <table:table-cell office:value-type="string">
            <text:p>Souci officinal</text:p>
          </table:table-cell>
          <table:table-cell table:style-name="ce9" office:value-type="string">
            <text:p>Asteraceae</text:p>
          </table:table-cell>
          <table:table-cell table:style-name="ce9" office:value-type="string">
            <text:p>infusion, usage externe, macérat</text:p>
          </table:table-cell>
          <table:table-cell table:style-name="ce9" office:value-type="string">
            <text:p>cicatrisante, anti-inflammatoire, antiseptique</text:p>
          </table:table-cell>
          <table:table-cell table:style-name="ce9" office:value-type="string">
            <text:p>plaies, brûlures, inflammations cutanées</text:p>
          </table:table-cell>
          <table:table-cell office:value-type="string">
            <text:p>Inflorescences</text:p>
          </table:table-cell>
          <table:table-cell office:value-type="string">
            <text:p>-</text:p>
          </table:table-cell>
          <table:table-cell table:style-name="ce2" office:value-type="string">
            <text:p>-</text:p>
          </table:table-cell>
          <table:table-cell table:number-columns-repeated="2" office:value-type="string">
            <text:p>-</text:p>
          </table:table-cell>
        </table:table-row>
        <table:table-row table:style-name="ro3">
          <table:table-cell office:value-type="string">
            <text:p><text:span text:style-name="T3">Camellia sinensis</text:span><text:span text:style-name="T4"> (L.) Kuntze</text:span></text:p>
          </table:table-cell>
          <table:table-cell office:value-type="string">
            <text:p>Théier (vert)</text:p>
          </table:table-cell>
          <table:table-cell office:value-type="string">
            <text:p>Theaceae</text:p>
          </table:table-cell>
          <table:table-cell office:value-type="string">
            <text:p>infusion</text:p>
          </table:table-cell>
          <table:table-cell office:value-type="string">
            <text:p>stimulante, antioxydante, diurétique</text:p>
          </table:table-cell>
          <table:table-cell office:value-type="string">
            <text:p>fatigue, vigilance, drainage</text:p>
          </table:table-cell>
          <table:table-cell office:value-type="string">
            <text:p>Feuille</text:p>
          </table:table-cell>
          <table:table-cell office:value-type="string">
            <text:p>En cas de d’ulcère gastro-duodénal ou de troubles cardiaques (arythmie, hypertension), ou d’hyperthyroïdie, ne pas consommer un CA contenant une préparation à base de cette partie de plante.</text:p>
          </table:table-cell>
          <table:table-cell office:value-type="string">
            <text:p>Surveiller les interactions médicamenteuses suivantes : </text:p>
            <text:p>·      <text:s/>Diminution de l’effet des médicaments sédatifs; </text:p>
            <text:p>·      Augmentation des effets indésirables des médicaments sympathomimétiques (comme l’adrénaline, la dobutamine, la dopamine, la dopexamine, l’isoprénaline, la noradrénaline, la phényléphrine).</text:p>
          </table:table-cell>
          <table:table-cell office:value-type="string">
            <text:p>En raison de la présence de caféine et de catéchines (dont l’EGCG), chez la femme enceinte ou allaitante, éviter de consommer un CA contenant une préparation à base de cette partie de plante</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Capsella bursa-pastoris </text:span><text:span text:style-name="T4">(L.) Medik.</text:span></text:p>
          </table:table-cell>
          <table:table-cell office:value-type="string">
            <text:p>Bourse-à-pasteur commune</text:p>
          </table:table-cell>
          <table:table-cell table:style-name="ce9" office:value-type="string">
            <text:p>Brassicaceae</text:p>
          </table:table-cell>
          <table:table-cell table:style-name="ce9" office:value-type="string">
            <text:p>infusion, teinture mère</text:p>
          </table:table-cell>
          <table:table-cell table:style-name="ce9" office:value-type="string">
            <text:p>hémostatique, astringente</text:p>
          </table:table-cell>
          <table:table-cell table:style-name="ce9" office:value-type="string">
            <text:p>règles abondantes, petits saignements</text:p>
          </table:table-cell>
          <table:table-cell office:value-type="string">
            <text:p>Parties aériennes</text:p>
          </table:table-cell>
          <table:table-cell table:number-columns-repeated="2" office:value-type="string">
            <text:p>-</text:p>
          </table:table-cell>
          <table:table-cell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Capsicum annuum </text:span><text:span text:style-name="T4">L.</text:span></text:p>
          </table:table-cell>
          <table:table-cell office:value-type="string">
            <text:p>Piment</text:p>
          </table:table-cell>
          <table:table-cell office:value-type="string">
            <text:p>Solanaceae</text:p>
          </table:table-cell>
          <table:table-cell office:value-type="string">
            <text:p>alimentaire, extrait</text:p>
          </table:table-cell>
          <table:table-cell office:value-type="string">
            <text:p>stimulant, rubéfiant, digestif</text:p>
          </table:table-cell>
          <table:table-cell office:value-type="string">
            <text:p>fatigue, digestion lente</text:p>
          </table:table-cell>
          <table:table-cell office:value-type="string">
            <text:p>Fruit</text:p>
          </table:table-cell>
          <table:table-cell table:number-columns-repeated="4" office:value-type="string">
            <text:p>-</text:p>
          </table:table-cell>
        </table:table-row>
        <table:table-row table:style-name="ro1">
          <table:table-cell office:value-type="string">
            <text:p><text:span text:style-name="T3">Carum carvi</text:span><text:span text:style-name="T4"> L.</text:span></text:p>
          </table:table-cell>
          <table:table-cell office:value-type="string">
            <text:p>Carvi, Cumin des prés</text:p>
          </table:table-cell>
          <table:table-cell table:style-name="ce9" office:value-type="string">
            <text:p>Apiaceae</text:p>
          </table:table-cell>
          <table:table-cell table:style-name="ce9" office:value-type="string">
            <text:p>infusion, usage alimentaire</text:p>
          </table:table-cell>
          <table:table-cell table:style-name="ce9" office:value-type="string">
            <text:p>carminatif, antispasmodique</text:p>
          </table:table-cell>
          <table:table-cell table:style-name="ce9" office:value-type="string">
            <text:p>ballonnements, gaz intestinaux</text:p>
          </table:table-cell>
          <table:table-cell office:value-type="string">
            <text:p>Fruit</text:p>
          </table:table-cell>
          <table:table-cell office:value-type="string">
            <text:p><text:s/>En cas d’obstruction biliaire ou d’insuffisance hépatique ou d’achlorhydrie, ne pas consommer un CA contenant une préparation à base de cette partie de plante. En cas d’allergie à d'autres plantes de la famille des Apiaceae telles que fenouil, céleri, anis, coriandre, ainsi qu'au pollen de bouleau, ou à l'absinthe, ne pas consommer un CA contenant une préparation à base de cette partie de plante.</text:p>
          </table:table-cell>
          <table:table-cell table:style-name="ce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1">
          <table:table-cell office:value-type="string">
            <text:p><text:span text:style-name="T3">Centaurium erythraea </text:span><text:span text:style-name="T4">Rafn.</text:span></text:p>
          </table:table-cell>
          <table:table-cell office:value-type="string">
            <text:p>Erythrée petite centaurée</text:p>
          </table:table-cell>
          <table:table-cell office:value-type="string">
            <text:p>Gentianaceae</text:p>
          </table:table-cell>
          <table:table-cell office:value-type="string">
            <text:p>infusion</text:p>
          </table:table-cell>
          <table:table-cell office:value-type="string">
            <text:p>tonique amère, digestive</text:p>
          </table:table-cell>
          <table:table-cell office:value-type="string">
            <text:p>manque d’appétit, digestion lente</text:p>
          </table:table-cell>
          <table:table-cell office:value-type="string">
            <text:p>Parties aériennes</text:p>
          </table:table-cell>
          <table:table-cell office:value-type="string">
            <text:p><text:s/>En cas d’ulcère gastroduodénal, ne pas consommer un CA contenant une préparation à base de cette partie de plante.</text:p>
          </table:table-cell>
          <table:table-cell table:style-name="ce2" office:value-type="string">
            <text:p>-</text:p>
          </table:table-cell>
          <table:table-cell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5">
          <table:table-cell office:value-type="string">
            <text:p><text:span text:style-name="T3">Cetraria islandica </text:span><text:span text:style-name="T4">(L.) Acharius s.l.</text:span></text:p>
          </table:table-cell>
          <table:table-cell office:value-type="string">
            <text:p> Mousse d’Islande ou Lichen d’Islande</text:p>
          </table:table-cell>
          <table:table-cell table:style-name="ce9" office:value-type="string">
            <text:p>Parmeliaceae</text:p>
          </table:table-cell>
          <table:table-cell table:style-name="ce9" office:value-type="string">
            <text:p>décoction, sirop</text:p>
          </table:table-cell>
          <table:table-cell table:style-name="ce9" office:value-type="string">
            <text:p>émolliente, nutritive, antitussive</text:p>
          </table:table-cell>
          <table:table-cell table:style-name="ce9" office:value-type="string">
            <text:p>toux, irritation des voies respiratoires</text:p>
          </table:table-cell>
          <table:table-cell office:value-type="string">
            <text:p>Thalle</text:p>
          </table:table-cell>
          <table:table-cell office:value-type="string">
            <text:p>-</text:p>
          </table:table-cell>
          <table:table-cell office:value-type="string">
            <text:p>En cas de traitement médicamenteux concomitant consommer le produit contenant cette plante à distance du ou des médicaments (au moins 60 minutes d’intervalle) <text:s/></text:p>
          </table:table-cell>
          <table:table-cell office:value-type="string">
            <text:p>En l’absence de données, chez la femme enceinte ou allaitante, éviter de consommer un CA contenant une préparation à base de cette partie de plante </text:p>
          </table:table-cell>
          <table:table-cell table:style-name="ce16" office:value-type="string">
            <text:p>En l’absence de données, avant l’âge de 6 ans, éviter de consommer un CA contenant une préparation à base de cette partie de plante. Réservé à l’adulte.</text:p>
            <text:p><text:span text:style-name="T6">A partir de 6 ans :</text:span><text:span text:style-name="T5"> </text:span></text:p>
            <text:p>• 6-12 ans : extrait aqueux - 32 mg à 2,4 g/j équivalent plante sèche. <text:s/></text:p>
            <text:p>• &gt; 12 ans : posologie adulte.</text:p>
            <text:p/>
          </table:table-cell>
        </table:table-row>
        <table:table-row table:style-name="ro1">
          <table:table-cell office:value-type="string">
            <text:p><text:span text:style-name="T3">Chamaemelum nobile </text:span><text:span text:style-name="T4">(L.) All.</text:span></text:p>
          </table:table-cell>
          <table:table-cell office:value-type="string">
            <text:p>Camomille romaine</text:p>
          </table:table-cell>
          <table:table-cell office:value-type="string">
            <text:p>Asteraceae</text:p>
          </table:table-cell>
          <table:table-cell office:value-type="string">
            <text:p>infusion, usage externe</text:p>
          </table:table-cell>
          <table:table-cell office:value-type="string">
            <text:p>calmante, antispasmodique, digestive</text:p>
          </table:table-cell>
          <table:table-cell office:value-type="string">
            <text:p>stress, troubles digestifs, insomnie</text:p>
          </table:table-cell>
          <table:table-cell office:value-type="string">
            <text:p>Fleur</text:p>
          </table:table-cell>
          <table:table-cell office:value-type="string">
            <text:p>En cas d'allergie croisée connue (en particulier aux plantes de la famille des Asteraceae, ne pas consommer un CA contenant une préparation à base de cette partie de plante.</text:p>
          </table:table-cell>
          <table:table-cell table:style-name="ce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1">
          <table:table-cell office:value-type="string">
            <text:p><text:span text:style-name="T3">Cichorium intybus</text:span><text:span text:style-name="T4"> L.</text:span></text:p>
          </table:table-cell>
          <table:table-cell office:value-type="string">
            <text:p>Chicorée sauvage</text:p>
          </table:table-cell>
          <table:table-cell table:style-name="ce9" office:value-type="string">
            <text:p>Asteraceae</text:p>
          </table:table-cell>
          <table:table-cell table:style-name="ce9" office:value-type="string">
            <text:p>décoction, infusion</text:p>
          </table:table-cell>
          <table:table-cell table:style-name="ce9" office:value-type="string">
            <text:p>cholérétique, digestive</text:p>
          </table:table-cell>
          <table:table-cell table:style-name="ce9" office:value-type="string">
            <text:p>troubles hépatiques, digestion lente</text:p>
          </table:table-cell>
          <table:table-cell office:value-type="string">
            <text:p>Fleur, feuille, racine</text:p>
          </table:table-cell>
          <table:table-cell office:value-type="string">
            <text:p>En cas d'allergie croisée connue, en particulier aux plantes de la famille des Asteraceae, ne pas consommer un CA contenant une préparation à base de cette partie de plante.</text:p>
          </table:table-cell>
          <table:table-cell table:style-name="ce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1">
          <table:table-cell office:value-type="string">
            <text:p><text:span text:style-name="T3">Cinnamomum verum </text:span><text:span text:style-name="T4">J.Presl.</text:span></text:p>
          </table:table-cell>
          <table:table-cell office:value-type="string">
            <text:p>Cannelier, Cannelier de Ceylan</text:p>
          </table:table-cell>
          <table:table-cell office:value-type="string">
            <text:p>Lauraceae</text:p>
          </table:table-cell>
          <table:table-cell office:value-type="string">
            <text:p>infusion, poudre</text:p>
          </table:table-cell>
          <table:table-cell office:value-type="string">
            <text:p>stimulante, antiseptique, digestive</text:p>
          </table:table-cell>
          <table:table-cell office:value-type="string">
            <text:p>fatigue, troubles digestifs</text:p>
          </table:table-cell>
          <table:table-cell office:value-type="string">
            <text:p>Ecorce, feuille</text:p>
          </table:table-cell>
          <table:table-cell office:value-type="string">
            <text:p>En cas d'allergie croisée connue, en particulier avec le baume du Pérou, ne pas consommer un CA contenant une préparation à base de cette partie de plante.</text:p>
          </table:table-cell>
          <table:table-cell table:style-name="ce2" office:value-type="string">
            <text:p>-</text:p>
          </table:table-cell>
          <table:table-cell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6">
          <table:table-cell office:value-type="string">
            <text:p><text:span text:style-name="T3">Cola acuminata </text:span><text:span text:style-name="T4">(P.Beauv.) Schott et Endl.</text:span></text:p>
          </table:table-cell>
          <table:table-cell office:value-type="string">
            <text:p>Noix de cola, Colatier</text:p>
          </table:table-cell>
          <table:table-cell table:style-name="ce9" office:value-type="string">
            <text:p>Malvaceae</text:p>
          </table:table-cell>
          <table:table-cell table:style-name="ce9" office:value-type="string">
            <text:p>extrait, poudre</text:p>
          </table:table-cell>
          <table:table-cell table:style-name="ce9" office:value-type="string">
            <text:p>stimulante, tonique</text:p>
          </table:table-cell>
          <table:table-cell table:style-name="ce9" office:value-type="string">
            <text:p>fatigue physique et mentale</text:p>
          </table:table-cell>
          <table:table-cell office:value-type="string">
            <text:p>Graine</text:p>
          </table:table-cell>
          <table:table-cell office:value-type="string">
            <text:p>En cas d’ulcère gastro-duodénal et/ou de troubles cardiaques (arythmie, hypertension), et/ou d’hyperthyroïdie, éviter de consommer un complément alimentaire contenant une préparation à base de cette partie de plante cette plante.</text:p>
          </table:table-cell>
          <table:table-cell office:value-type="string">
            <text:p>Eviter de consommer le C.A. en cas de prise de médicaments sédatifs ou sympathomimétiques. </text:p>
            <text:p>·      Diminution de l’effet des médicaments sédatifs.</text:p>
            <text:p>·      Augmentation des effets indésirables des médicaments sympathomimétiques (comme l’adrénaline, la dobutamine, la dopamine, la dopexamine, l’isoprénaline, la noradrénaline, la phényléphrine).</text:p>
            <text:p>o  En cas de traitement concomitant par un médicament Inhibiteur de la Mono-Amine Oxydase (IMAO), éviter de consommer un complément alimentaire contenant une préparation à base de cette partie de plante.</text:p>
          </table:table-cell>
          <table:table-cell office:value-type="string">
            <text:p>Chez la femme enceinte ou allaitante, contre-indication de consommer un CA contenant une préparation à base de cett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Crataegus</text:span><text:span text:style-name="T4"> spp.</text:span><text:span text:style-name="T3"> (C. azarolus </text:span><text:span text:style-name="T4">L.</text:span><text:span text:style-name="T3">, C. laevigata </text:span><text:span text:style-name="T4">(Poir.) DC</text:span><text:span text:style-name="T3">., C. monogyna </text:span><text:span text:style-name="T4">Jacq.</text:span><text:span text:style-name="T3">, C. pentagyna </text:span><text:span text:style-name="T4">Waldst. &amp; Kit.</text:span><text:span text:style-name="T3">)</text:span></text:p>
          </table:table-cell>
          <table:table-cell office:value-type="string">
            <text:p>Aubépine</text:p>
          </table:table-cell>
          <table:table-cell office:value-type="string">
            <text:p>Rosaceae</text:p>
          </table:table-cell>
          <table:table-cell office:value-type="string">
            <text:p>infusion, extrait, gélules</text:p>
          </table:table-cell>
          <table:table-cell office:value-type="string">
            <text:p>cardiotonique, sédative</text:p>
          </table:table-cell>
          <table:table-cell office:value-type="string">
            <text:p>palpitations, anxiété légère</text:p>
          </table:table-cell>
          <table:table-cell office:value-type="string">
            <text:p>Fruit, feuille, bourgeon de feuille, sommité fleurie</text:p>
          </table:table-cell>
          <table:table-cell table:number-columns-repeated="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1">
          <table:table-cell office:value-type="string">
            <text:p><text:span text:style-name="T3">Cucurbita pepo </text:span><text:span text:style-name="T4">L.</text:span></text:p>
          </table:table-cell>
          <table:table-cell office:value-type="string">
            <text:p>Courge, Courgette, Citrouille</text:p>
          </table:table-cell>
          <table:table-cell table:style-name="ce9" office:value-type="string">
            <text:p>Cucurbitaceae</text:p>
          </table:table-cell>
          <table:table-cell table:style-name="ce9" office:value-type="string">
            <text:p>graines, huile</text:p>
          </table:table-cell>
          <table:table-cell table:style-name="ce9" office:value-type="string">
            <text:p>antiparasitaire, protectrice prostatique</text:p>
          </table:table-cell>
          <table:table-cell table:style-name="ce9" office:value-type="string">
            <text:p>parasites intestinaux, troubles urinaires</text:p>
          </table:table-cell>
          <table:table-cell office:value-type="string">
            <text:p>Graine</text:p>
          </table:table-cell>
          <table:table-cell table:number-columns-repeated="2" office:value-type="string">
            <text:p>-</text:p>
          </table:table-cell>
          <table:table-cell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Curcuma longa </text:span><text:span text:style-name="T4">L.</text:span></text:p>
          </table:table-cell>
          <table:table-cell office:value-type="string">
            <text:p>Curcuma</text:p>
          </table:table-cell>
          <table:table-cell office:value-type="string">
            <text:p>Zingiberaceae</text:p>
          </table:table-cell>
          <table:table-cell office:value-type="string">
            <text:p>poudre, extrait</text:p>
          </table:table-cell>
          <table:table-cell office:value-type="string">
            <text:p>anti-inflammatoire, antioxydante</text:p>
          </table:table-cell>
          <table:table-cell office:value-type="string">
            <text:p>douleurs articulaires, troubles digestifs</text:p>
          </table:table-cell>
          <table:table-cell office:value-type="string">
            <text:p>Rhizome</text:p>
          </table:table-cell>
          <table:table-cell office:value-type="string">
            <text:p><text:s/>En cas d’obstruction biliaire ou d’autres troubles de la fonction biliaire, ne pas consommer un CA contenant une préparation à base de cette partie de plante.</text:p>
          </table:table-cell>
          <table:table-cell office:value-type="string">
            <text:p>-</text:p>
          </table:table-cell>
          <table:table-cell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Curcuma xanthorrhiza </text:span><text:span text:style-name="T4">Roxb.</text:span></text:p>
          </table:table-cell>
          <table:table-cell office:value-type="string">
            <text:p>Temoe-lawacq</text:p>
          </table:table-cell>
          <table:table-cell table:style-name="ce9" office:value-type="string">
            <text:p>—</text:p>
          </table:table-cell>
          <table:table-cell table:style-name="ce9" office:value-type="string">
            <text:p>infusion</text:p>
          </table:table-cell>
          <table:table-cell table:style-name="ce9" office:value-type="string">
            <text:p>tonique, adaptogène</text:p>
          </table:table-cell>
          <table:table-cell table:style-name="ce9" office:value-type="string">
            <text:p>fatigue générale</text:p>
          </table:table-cell>
          <table:table-cell office:value-type="string">
            <text:p>Rhizome</text:p>
          </table:table-cell>
          <table:table-cell office:value-type="string">
            <text:p><text:s/>En cas d’obstruction biliaire ou d’autres troubles de la fonction biliaire, ne pas consommer un CA contenant une préparation à base de cette partie de plante.</text:p>
          </table:table-cell>
          <table:table-cell office:value-type="string">
            <text:p>-</text:p>
          </table:table-cell>
          <table:table-cell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7">
          <table:table-cell office:value-type="string">
            <text:p><text:span text:style-name="T3">Cynara scolymus</text:span><text:span text:style-name="T4"> L.</text:span></text:p>
          </table:table-cell>
          <table:table-cell office:value-type="string">
            <text:p>Artichaut </text:p>
          </table:table-cell>
          <table:table-cell office:value-type="string">
            <text:p>Asteraceae</text:p>
          </table:table-cell>
          <table:table-cell office:value-type="string">
            <text:p>infusion, extrait</text:p>
          </table:table-cell>
          <table:table-cell office:value-type="string">
            <text:p>cholérétique, dépurative</text:p>
          </table:table-cell>
          <table:table-cell office:value-type="string">
            <text:p>foie paresseux, digestion difficile</text:p>
          </table:table-cell>
          <table:table-cell office:value-type="string">
            <text:p>Feuille, capitule </text:p>
          </table:table-cell>
          <table:table-cell office:value-type="string">
            <text:p>En cas d’obstruction biliaire ou d’autres troubles de la fonction biliaire, ne pas consommer un CA contenant une préparation à base de cette partie de plante.</text:p>
            <text:p>En cas d'allergie croisée connue, en particulier aux plantes de la famille des Asteraceae, ne pas consommer un CA contenant une préparation à base de cette partie de plante.</text:p>
          </table:table-cell>
          <table:table-cell table:style-name="ce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1">
          <table:table-cell office:value-type="string">
            <text:p><text:span text:style-name="T3">Echinacea angustifolia </text:span><text:span text:style-name="T4">DC.</text:span></text:p>
          </table:table-cell>
          <table:table-cell office:value-type="string">
            <text:p>Échinacée à feuilles étroites </text:p>
          </table:table-cell>
          <table:table-cell table:style-name="ce9" office:value-type="string">
            <text:p>Asteraceae</text:p>
          </table:table-cell>
          <table:table-cell table:style-name="ce9" office:value-type="string">
            <text:p>extrait, teinture mère</text:p>
          </table:table-cell>
          <table:table-cell table:style-name="ce9" office:value-type="string">
            <text:p>immunostimulante, anti-infectieuse</text:p>
          </table:table-cell>
          <table:table-cell table:style-name="ce9" office:value-type="string">
            <text:p>infections répétées</text:p>
          </table:table-cell>
          <table:table-cell office:value-type="string">
            <text:p>Organes souterrains</text:p>
          </table:table-cell>
          <table:table-cell office:value-type="string">
            <text:p>En cas de pathologie du système immunitaire ou de prise de médicaments affectant le système immunitaire, ne pas consommer un CA contenant une préparation à base de cette partie de plante. En cas d'allergie croisée connue, en particulier aux plantes de la famille des Asteraceae, ne pas consommer un CA contenant une préparation à base de cette partie de plante.</text:p>
          </table:table-cell>
          <table:table-cell table:style-name="ce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1">
          <table:table-cell office:value-type="string">
            <text:p><text:span text:style-name="T3">Echinacea pallida </text:span><text:span text:style-name="T4">(Nutt.) Nutt.</text:span></text:p>
          </table:table-cell>
          <table:table-cell office:value-type="string">
            <text:p>Echinacée pâle</text:p>
          </table:table-cell>
          <table:table-cell office:value-type="string">
            <text:p>Asteraceae</text:p>
          </table:table-cell>
          <table:table-cell office:value-type="string">
            <text:p>extrait, teinture mère</text:p>
          </table:table-cell>
          <table:table-cell office:value-type="string">
            <text:p>immunostimulante</text:p>
          </table:table-cell>
          <table:table-cell office:value-type="string">
            <text:p>prévention des infections</text:p>
          </table:table-cell>
          <table:table-cell office:value-type="string">
            <text:p>Organes souterrains</text:p>
          </table:table-cell>
          <table:table-cell office:value-type="string">
            <text:p>En cas de pathologie du système immunitaire ou de prise de médicaments affectant le système immunitaire, ne pas consommer un CA contenant une préparation à base de cette partie de plante. En cas d'allergie croisée connue, en particulier aux plantes de la famille des Asteraceae, ne pas consommer un CA contenant une préparation à base de cette partie de plante.</text:p>
          </table:table-cell>
          <table:table-cell table:style-name="ce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1">
          <table:table-cell office:value-type="string">
            <text:p><text:span text:style-name="T3">Echinacea purpurea </text:span><text:span text:style-name="T4">(L.) Moench</text:span></text:p>
          </table:table-cell>
          <table:table-cell office:value-type="string">
            <text:p>Echinacée pourpre</text:p>
          </table:table-cell>
          <table:table-cell table:style-name="ce9" office:value-type="string">
            <text:p>Asteraceae</text:p>
          </table:table-cell>
          <table:table-cell table:style-name="ce9" office:value-type="string">
            <text:p>extrait, teinture mère</text:p>
          </table:table-cell>
          <table:table-cell table:style-name="ce9" office:value-type="string">
            <text:p>immunostimulante, anti-inflammatoire</text:p>
          </table:table-cell>
          <table:table-cell table:style-name="ce9" office:value-type="string">
            <text:p>infections respiratoires</text:p>
          </table:table-cell>
          <table:table-cell office:value-type="string">
            <text:p>Parties aériennes, organes souterrains</text:p>
          </table:table-cell>
          <table:table-cell office:value-type="string">
            <text:p>En cas de pathologie du système immunitaire ou de prise de médicaments affectant le système immunitaire, ne pas consommer un CA contenant une préparation à base de cette partie de plante. En cas d'allergie croisée connue, en particulier aux plantes de la famille des Asteraceae, ne pas consommer un CA contenant une préparation à base de cette partie de plante.</text:p>
          </table:table-cell>
          <table:table-cell table:style-name="ce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1">
          <table:table-cell office:value-type="string">
            <text:p><text:span text:style-name="T3">Eleutherococcus senticosus</text:span><text:span text:style-name="T4"> (Rupr. et Maxim.) Maxim.</text:span></text:p>
          </table:table-cell>
          <table:table-cell office:value-type="string">
            <text:p>Eleuthérocoque</text:p>
          </table:table-cell>
          <table:table-cell office:value-type="string">
            <text:p>Araliaceae</text:p>
          </table:table-cell>
          <table:table-cell office:value-type="string">
            <text:p>extrait, gélules</text:p>
          </table:table-cell>
          <table:table-cell office:value-type="string">
            <text:p>adaptogène, tonique</text:p>
          </table:table-cell>
          <table:table-cell office:value-type="string">
            <text:p>fatigue, baisse d’immunité</text:p>
          </table:table-cell>
          <table:table-cell office:value-type="string">
            <text:p>Organes souterrains</text:p>
          </table:table-cell>
          <table:table-cell office:value-type="string">
            <text:p>-</text:p>
          </table:table-cell>
          <table:table-cell table:style-name="ce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3">
          <table:table-cell office:value-type="string">
            <text:p><text:span text:style-name="T3">Elymus repens </text:span><text:span text:style-name="T4">(L.) Gould </text:span><text:span text:style-name="T3">(syn. Agropyron repens </text:span><text:span text:style-name="T4">(L.) P. Beauv.</text:span><text:span text:style-name="T3">)</text:span></text:p>
          </table:table-cell>
          <table:table-cell office:value-type="string">
            <text:p>Chiendent</text:p>
          </table:table-cell>
          <table:table-cell table:style-name="ce9" office:value-type="string">
            <text:p>Poaceae</text:p>
          </table:table-cell>
          <table:table-cell table:style-name="ce9" office:value-type="string">
            <text:p>décoction</text:p>
          </table:table-cell>
          <table:table-cell table:style-name="ce9" office:value-type="string">
            <text:p>diurétique, dépuratif</text:p>
          </table:table-cell>
          <table:table-cell table:style-name="ce9" office:value-type="string">
            <text:p>troubles urinaires, drainage</text:p>
          </table:table-cell>
          <table:table-cell office:value-type="string">
            <text:p>Parties aériennes</text:p>
          </table:table-cell>
          <table:table-cell office:value-type="string">
            <text:p>En cas d’insuffisance cardiaque ou rénale sévère, ne pas consommer un CA contenant une préparation à base de cette partie de plante.</text:p>
          </table:table-cell>
          <table:table-cell table:style-name="ce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text:s/>En l’absence de données cliniques, avant l’âge de 12 ans, éviter de consommer un complément alimentaire contenant un extrait aqueux à base de cette partie de plante (feuilles).</text:p>
            <text:p>En l’absence de données cliniques, avant l’âge de 18 ans, éviter de consommer un complément alimentaire contenant un extrait hydro-éthanolique à base de cette partie de plante (feuilles). Réservé à l’adulte.</text:p>
            <text:p/>
          </table:table-cell>
        </table:table-row>
        <table:table-row table:style-name="ro1">
          <table:table-cell office:value-type="string">
            <text:p><text:span text:style-name="T3">Epilobium angustifolium </text:span><text:span text:style-name="T4">L.</text:span><text:span text:style-name="T3"> et Epilobium parviflorum </text:span><text:span text:style-name="T4">Schreb.</text:span></text:p>
          </table:table-cell>
          <table:table-cell office:value-type="string">
            <text:p>Epilobe en épi, Epilobe à feuilles étroites, Epilobe à petites fleurs</text:p>
          </table:table-cell>
          <table:table-cell office:value-type="string">
            <text:p>Onagraceae</text:p>
          </table:table-cell>
          <table:table-cell office:value-type="string">
            <text:p>infusion</text:p>
          </table:table-cell>
          <table:table-cell office:value-type="string">
            <text:p>anti-inflammatoire, astringente</text:p>
          </table:table-cell>
          <table:table-cell office:value-type="string">
            <text:p>troubles prostatiques légers</text:p>
          </table:table-cell>
          <table:table-cell office:value-type="string">
            <text:p>Parties aériennes</text:p>
          </table:table-cell>
          <table:table-cell office:value-type="string">
            <text:p>-</text:p>
          </table:table-cell>
          <table:table-cell table:style-name="ce2" office:value-type="string">
            <text:p>-</text:p>
          </table:table-cell>
          <table:table-cell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Equisetum arvense </text:span><text:span text:style-name="T4">L.</text:span></text:p>
          </table:table-cell>
          <table:table-cell office:value-type="string">
            <text:p>Prêle des champs</text:p>
          </table:table-cell>
          <table:table-cell table:style-name="ce9" office:value-type="string">
            <text:p>Equisetaceae</text:p>
          </table:table-cell>
          <table:table-cell table:style-name="ce9" office:value-type="string">
            <text:p>infusion, décoction</text:p>
          </table:table-cell>
          <table:table-cell table:style-name="ce9" office:value-type="string">
            <text:p>reminéralisante, diurétique</text:p>
          </table:table-cell>
          <table:table-cell table:style-name="ce9" office:value-type="string">
            <text:p>fragilité osseuse, drainage</text:p>
          </table:table-cell>
          <table:table-cell office:value-type="string">
            <text:p>Parties aériennes</text:p>
          </table:table-cell>
          <table:table-cell office:value-type="string">
            <text:p>En cas d’insuffisance cardiaque ou rénale œdémateuse, ne pas consommer un CA contenant une préparation à base de cette partie de plante.</text:p>
          </table:table-cell>
          <table:table-cell table:style-name="ce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1">
          <table:table-cell office:value-type="string">
            <text:p><text:span text:style-name="T3">Eschscholzia californica </text:span><text:span text:style-name="T4">Cham.</text:span></text:p>
          </table:table-cell>
          <table:table-cell office:value-type="string">
            <text:p>Eschscholtzia de Californie, Pavot jaune de Californie</text:p>
          </table:table-cell>
          <table:table-cell office:value-type="string">
            <text:p>Papaveraceae</text:p>
          </table:table-cell>
          <table:table-cell office:value-type="string">
            <text:p>infusion, extrait</text:p>
          </table:table-cell>
          <table:table-cell office:value-type="string">
            <text:p>sédative, anxiolytique</text:p>
          </table:table-cell>
          <table:table-cell office:value-type="string">
            <text:p>insomnie, nervosité</text:p>
          </table:table-cell>
          <table:table-cell office:value-type="string">
            <text:p>Parties aériennes</text:p>
          </table:table-cell>
          <table:table-cell office:value-type="string">
            <text:p>-</text:p>
          </table:table-cell>
          <table:table-cell table:style-name="ce2" office:value-type="string">
            <text:p>-</text:p>
          </table:table-cell>
          <table:table-cell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3">
          <table:table-cell office:value-type="string">
            <text:p><text:span text:style-name="T3">Eucalyptus globulus </text:span><text:span text:style-name="T4">Labill.</text:span></text:p>
          </table:table-cell>
          <table:table-cell office:value-type="string">
            <text:p>Eucalyptus globuleux, Gommier bleu</text:p>
          </table:table-cell>
          <table:table-cell table:style-name="ce9" office:value-type="string">
            <text:p>Myrtaceae</text:p>
          </table:table-cell>
          <table:table-cell table:style-name="ce9" office:value-type="string">
            <text:p>inhalation, infusion</text:p>
          </table:table-cell>
          <table:table-cell table:style-name="ce9" office:value-type="string">
            <text:p>antiseptique, expectorante</text:p>
          </table:table-cell>
          <table:table-cell table:style-name="ce9" office:value-type="string">
            <text:p>affections respiratoires</text:p>
          </table:table-cell>
          <table:table-cell office:value-type="string">
            <text:p>Feuille</text:p>
          </table:table-cell>
          <table:table-cell office:value-type="string">
            <text:p>En cas d’ulcère ou d’inflammation du tractus digestif, ne pas consommer de complément alimentaire contenant une préparation à base de cette partie de plante.</text:p>
          </table:table-cell>
          <table:table-cell table:style-name="ce2" office:value-type="string">
            <text:p>-</text:p>
          </table:table-cell>
          <table:table-cell office:value-type="string">
            <text:p>En l’absence de données, chez la femme enceinte ou allaitante, éviter de consommer un complément alimentaire contenant une préparation à base de cette partie de plante </text:p>
          </table:table-cell>
          <table:table-cell office:value-type="string">
            <text:p>*En raison de la présence de 1,8-cinéole, chez les moins de 30 mois, la consommation d’un complément alimentaire contenant une préparation à base de cette partie de plante (feuilles) est formellement contre-indiquée. </text:p>
            <text:p>*En l’absence de données cliniques, avant l’âge de 12 ans, éviter de consommer un complément alimentaire contenant un extrait aqueux à base de cette partie de plante (feuilles). </text:p>
            <text:p>*En l’absence de données cliniques, avant l’âge de 18 ans, éviter de consommer un complément alimentaire contenant un extrait hydro-éthanolique à base de cette partie de plante (feuilles). Réservé à l’adulte</text:p>
          </table:table-cell>
        </table:table-row>
        <table:table-row table:style-name="ro1">
          <table:table-cell office:value-type="string">
            <text:p><text:span text:style-name="T3">Filipendula ulmaria </text:span><text:span text:style-name="T4">(L.) Maxim.</text:span></text:p>
          </table:table-cell>
          <table:table-cell office:value-type="string">
            <text:p>Reine des prés, Spirée ulmaire, Barbe de bouc</text:p>
          </table:table-cell>
          <table:table-cell office:value-type="string">
            <text:p>Rosaceae</text:p>
          </table:table-cell>
          <table:table-cell office:value-type="string">
            <text:p>infusion</text:p>
          </table:table-cell>
          <table:table-cell office:value-type="string">
            <text:p>anti-inflammatoire, antalgique, fébrifuge</text:p>
          </table:table-cell>
          <table:table-cell office:value-type="string">
            <text:p>douleurs articulaires, fièvre, états grippaux</text:p>
          </table:table-cell>
          <table:table-cell office:value-type="string">
            <text:p>Fleur, sommité fleurie</text:p>
          </table:table-cell>
          <table:table-cell office:value-type="string">
            <text:p>En cas de d’hypersensibilité aux salicylés (aspirine), ne pas consommer un CA contenant une préparation à base de cette partie de plante.</text:p>
          </table:table-cell>
          <table:table-cell office:value-type="string">
            <text:p>Potentialise l’effet des salicylés et des anti-inflammatoires non-stéroïdiens. <text:s/></text:p>
          </table:table-cell>
          <table:table-cell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4">
          <table:table-cell table:style-name="ce2" office:value-type="string">
            <text:p>Foeniculum vulgare Mill. subsp. vulgare var. dulce (Mill.) Batt. &amp; Trab</text:p>
          </table:table-cell>
          <table:table-cell office:value-type="string">
            <text:p>Fenouil doux</text:p>
          </table:table-cell>
          <table:table-cell table:style-name="ce9" office:value-type="string">
            <text:p>Apiaceae</text:p>
          </table:table-cell>
          <table:table-cell table:style-name="ce9" office:value-type="string">
            <text:p>infusion</text:p>
          </table:table-cell>
          <table:table-cell table:style-name="ce9" office:value-type="string">
            <text:p>carminatif, digestif, antispasmodique</text:p>
          </table:table-cell>
          <table:table-cell table:style-name="ce9" office:value-type="string">
            <text:p>ballonnements, coliques, digestion lente</text:p>
          </table:table-cell>
          <table:table-cell office:value-type="string">
            <text:p>Parties aériennes</text:p>
          </table:table-cell>
          <table:table-cell office:value-type="string">
            <text:p>En cas de d'allergie croisée connue, en particulier à la famille des Apiaceae (anis, carvi, céleri, coriandre, aneth) ou au pollen d’armoise ou à l’anéthole, ne pas consommer un CA contenant une préparation à base de cette partie de plante.</text:p>
          </table:table-cell>
          <table:table-cell office:value-type="string">
            <text:p>-</text:p>
          </table:table-cell>
          <table:table-cell office:value-type="string">
            <text:p>En l’absence de données, chez la femme enceinte ou allaitante, éviter de consommer un CA contenant une préparation à base de cette partie de plante </text:p>
          </table:table-cell>
          <table:table-cell table:style-name="ce16" office:value-type="string">
            <text:p>En l’absence de données, avant l’âge de 4 ans, éviter de consommer un CA contenant une préparation à base de cette partie de plante</text:p>
            <text:p><text:span text:style-name="T5">Pour </text:span><text:span text:style-name="T4">Foeniculum vulgare Mill. var. dulcis uniquement</text:span></text:p>
            <text:p><text:span text:style-name="T6">A partir de 4 ans</text:span><text:span text:style-name="T5"> : </text:span></text:p>
            <text:p>• 4-12 ans : infusion </text:p>
            <text:p>3-5 g/j divisés en 3 prises (durée &lt; 7 jours).</text:p>
            <text:p/>
          </table:table-cell>
        </table:table-row>
        <table:table-row table:style-name="ro5">
          <table:table-cell table:style-name="ce2" office:value-type="string">
            <text:p>Foeniculum vulgare Miller subsp. vulgare var. vulgare </text:p>
          </table:table-cell>
          <table:table-cell office:value-type="string">
            <text:p>Fenouil amer</text:p>
          </table:table-cell>
          <table:table-cell office:value-type="string">
            <text:p>Apiaceae</text:p>
          </table:table-cell>
          <table:table-cell office:value-type="string">
            <text:p>infusion</text:p>
          </table:table-cell>
          <table:table-cell office:value-type="string">
            <text:p>digestif, carminatif, stimulant digestif</text:p>
          </table:table-cell>
          <table:table-cell office:value-type="string">
            <text:p>digestion difficile, lourdeurs abdominales</text:p>
          </table:table-cell>
          <table:table-cell office:value-type="string">
            <text:p>Parties aériennes</text:p>
          </table:table-cell>
          <table:table-cell office:value-type="string">
            <text:p>En cas de d'allergie croisée connue, en particulier à la famille des Apiaceae (anis, carvi, céleri, coriandre, aneth) ou au pollen d’armoise ou à l’anéthole, ne pas consommer un CA contenant une préparation à base de cette partie de plante.</text:p>
          </table:table-cell>
          <table:table-cell table:style-name="ce2" office:value-type="string">
            <text:p>-</text:p>
          </table:table-cell>
          <table:table-cell office:value-type="string">
            <text:p>En l’absence de données, chez la femme enceinte ou allaitante, contre-indication de consommer un CA contenant une préparation à base de cette partie de plante </text:p>
          </table:table-cell>
          <table:table-cell office:value-type="string">
            <text:p>En l’absence de données, avant l’âge de 4 ans, éviter de consommer un CA contenant une préparation à base de cette partie de plante. </text:p>
            <text:p>A partir de 4 ans : </text:p>
            <text:p>• 4-12 ans : infusion </text:p>
            <text:p>3-5 g/j divisés en 3 prises (durée &lt; 7 jours).</text:p>
            <text:p/>
          </table:table-cell>
        </table:table-row>
        <table:table-row table:style-name="ro6">
          <table:table-cell office:value-type="string">
            <text:p><text:span text:style-name="T3">Frangula dodonei </text:span><text:span text:style-name="T4">Ard.</text:span><text:span text:style-name="T3"> (syn. Rhamnus frangula </text:span><text:span text:style-name="T4">L.</text:span><text:span text:style-name="T3">, Frangula alnus </text:span><text:span text:style-name="T4">Mill.</text:span><text:span text:style-name="T3">)</text:span></text:p>
          </table:table-cell>
          <table:table-cell office:value-type="string">
            <text:p>Bourdaine</text:p>
          </table:table-cell>
          <table:table-cell table:style-name="ce9" office:value-type="string">
            <text:p>Rhamnaceae</text:p>
          </table:table-cell>
          <table:table-cell table:style-name="ce9" office:value-type="string">
            <text:p>décoction, extrait</text:p>
          </table:table-cell>
          <table:table-cell table:style-name="ce9" office:value-type="string">
            <text:p>laxative</text:p>
          </table:table-cell>
          <table:table-cell table:style-name="ce9" office:value-type="string">
            <text:p>constipation occasionnelle</text:p>
          </table:table-cell>
          <table:table-cell office:value-type="string">
            <text:p>Ecorce</text:p>
          </table:table-cell>
          <table:table-cell office:value-type="string">
            <text:p>* En cas d’insuffisance cardiaque ou rénale œdémateuses, ne pas consommer un CA contenant une préparation à base de cette partie de plante (risque de troubles hydro-électrolytiques). </text:p>
            <text:p>* En cas d’obstruction intestinale (par exemple fécalome), de symptômes digestifs pouvant l’évoquer, ou de maladie inflammatoire chronique intestinale (MICI), ne pas consommer un CA contenant une préparation à base de cette partie de plante.</text:p>
          </table:table-cell>
          <table:table-cell office:value-type="string">
            <text:p>*Potentialise l’effet des médicaments diurétiques sur la kaliémie : interfère avec les médicaments anti-arythmiques. </text:p>
            <text:p>*En cas de prise concomitante d’un traitement par des médicaments tels que des hétérosides cardiotoniques, des médicaments antiarythmiques ou allongeant l'intervalle QT, par des diurétiques, des corticostéroïdes ou de la racine de réglisse, éviter de consommer un CA contenant une préparation à base de cette partie de plante.</text:p>
            <text:p>*En cas de prise concomitante d’un traitement laxatif, ou de la consommation d’un produit contenant une autre plante à effet laxatif, éviter de consommer un CA contenant une préparation à base de cette partie de plante.</text:p>
            <text:p/>
          </table:table-cell>
          <table:table-cell office:value-type="string">
            <text:p>En raison de la présence de dérivés hydroxyanthracéniques (génotoxiques), chez la femme enceinte ou allaitante, la consommation d’un CA contenant une préparation à base de cette partie de plante est formellement contre-indiquée </text:p>
          </table:table-cell>
          <table:table-cell office:value-type="string">
            <text:p>En l’absence de données et en raison de la présence de dérivés hydroxyanthracéniques (génotoxiques), avant l’âge de 12 ans, la consommation d’un CA contenant une préparation à base de cette partie de plante est formellement contre-indiquée</text:p>
          </table:table-cell>
        </table:table-row>
        <table:table-row table:style-name="ro3">
          <table:table-cell office:value-type="string">
            <text:p><text:span text:style-name="T3">Frangula purshiana </text:span><text:span text:style-name="T4">Cooper</text:span><text:span text:style-name="T3"> (syn. Rhamnus purshiana</text:span><text:span text:style-name="T4"> DC.</text:span><text:span text:style-name="T3">)</text:span></text:p>
          </table:table-cell>
          <table:table-cell office:value-type="string">
            <text:p>Cascara, Écorce sacrée</text:p>
          </table:table-cell>
          <table:table-cell office:value-type="string">
            <text:p>Rhamnaceae</text:p>
          </table:table-cell>
          <table:table-cell office:value-type="string">
            <text:p>extrait</text:p>
          </table:table-cell>
          <table:table-cell office:value-type="string">
            <text:p>laxative stimulante</text:p>
          </table:table-cell>
          <table:table-cell office:value-type="string">
            <text:p>constipation chronique</text:p>
          </table:table-cell>
          <table:table-cell office:value-type="string">
            <text:p>Ecorce</text:p>
          </table:table-cell>
          <table:table-cell office:value-type="string">
            <text:p>* En cas d’insuffisance cardiaque ou rénale œdèmateuses, ne pas consommer un CA contenant une préparation à base de cette partie de plante (risque de troubles hydro-électrolytiques). </text:p>
            <text:p>* En cas d’obstruction intestinale (par exemple fécalome), de symptômes digestifs pouvant l’évoquer, et de maladie inflammatoire chronique intestinale (MICI), ne pas consommer un CA contenant une préparation à base de cette partie de plante.</text:p>
          </table:table-cell>
          <table:table-cell office:value-type="string">
            <text:p>*  Potentialise l’effet des médicaments diurétiques sur la kaliémie : interfère avec les médicaments anti-arythmiques. </text:p>
            <text:p>*  En cas de prise concomitante d’un traitement par des médicaments tels que des hétérosides cardiotoniques, des médicaments antiarythmiques ou allongeant l'intervalle QT, par des diurétiques, des corticostéroïdes ou de la racine de réglisse, éviter de consommer un CA contenant une préparation à base de cette partie de plante. </text:p>
            <text:p>* En cas de prise concomitante d’un traitement laxatif, ou de la consommation d’un produit contenant une autre plante à effet laxatif, éviter de consommer un CA contenant une préparation à base de cette partie de plante.</text:p>
          </table:table-cell>
          <table:table-cell office:value-type="string">
            <text:p>En raison de la présence de dérivés hydroxyanthracéniques (génotoxiques), chez la femme enceinte ou allaitante, la consommation d’un CA contenant une préparation à base de cette partie de plante est formellement contre-indiquée </text:p>
          </table:table-cell>
          <table:table-cell office:value-type="string">
            <text:p>En l’absence de données et en raison de la présence de dérivés hydroxyanthracéniques (génotoxiques), avant l’âge de 12 ans, la consommation d’un CA contenant une préparation à base de cette partie de plante est formellement contre-indiquée</text:p>
          </table:table-cell>
        </table:table-row>
        <table:table-row table:style-name="ro1">
          <table:table-cell office:value-type="string">
            <text:p><text:span text:style-name="T3">Fraxinus excelsior </text:span><text:span text:style-name="T4">L. </text:span></text:p>
          </table:table-cell>
          <table:table-cell office:value-type="string">
            <text:p>Frêne commun, Frêne élevé</text:p>
          </table:table-cell>
          <table:table-cell table:style-name="ce9" office:value-type="string">
            <text:p>Oleaceae</text:p>
          </table:table-cell>
          <table:table-cell table:style-name="ce9" office:value-type="string">
            <text:p>infusion, décoction</text:p>
          </table:table-cell>
          <table:table-cell table:style-name="ce9" office:value-type="string">
            <text:p>diurétique, anti-inflammatoire</text:p>
          </table:table-cell>
          <table:table-cell table:style-name="ce9" office:value-type="string">
            <text:p>rhumatismes, drainage articulaire</text:p>
          </table:table-cell>
          <table:table-cell office:value-type="string">
            <text:p>Ecorce, feuille, bourgeon de feuille, graine</text:p>
          </table:table-cell>
          <table:table-cell office:value-type="string">
            <text:p>En cas d’insuffisance cardiaque ou rénale œdémateuse, ne pas consommer un CA contenant une préparation à base de cette partie de plante.</text:p>
          </table:table-cell>
          <table:table-cell office:value-type="string">
            <text:p>-</text:p>
          </table:table-cell>
          <table:table-cell office:value-type="string">
            <text:p>En l’absence de données, chez la femme enceinte ou allaitante, éviter de consommer un CA contenant une préparation à base de cette partie de plante </text:p>
          </table:table-cell>
          <table:table-cell office:value-type="string">
            <text:p>En l’absence de données, avant l’âge de 4 ans, éviter de consommer un CA contenant une préparation à base de cette partie de plante</text:p>
          </table:table-cell>
        </table:table-row>
        <table:table-row table:style-name="ro7">
          <table:table-cell office:value-type="string">
            <text:p><text:span text:style-name="T3">Fucus vesiculosus</text:span><text:span text:style-name="T4"> L.</text:span><text:span text:style-name="T3"> [Fucus serratus </text:span><text:span text:style-name="T4">L.</text:span><text:span text:style-name="T3">]</text:span></text:p>
          </table:table-cell>
          <table:table-cell office:value-type="string">
            <text:p>Fucus, Varech vésiculeux</text:p>
          </table:table-cell>
          <table:table-cell office:value-type="string">
            <text:p>Fucaceae</text:p>
          </table:table-cell>
          <table:table-cell office:value-type="string">
            <text:p>poudre, gélules</text:p>
          </table:table-cell>
          <table:table-cell office:value-type="string">
            <text:p>stimulante thyroïdienne, reminéralisante</text:p>
          </table:table-cell>
          <table:table-cell office:value-type="string">
            <text:p>surpoids, fatigue métabolique</text:p>
          </table:table-cell>
          <table:table-cell office:value-type="string">
            <text:p>Toutes parties</text:p>
          </table:table-cell>
          <table:table-cell office:value-type="string">
            <text:p>En cas de pathologies cardiaques, rénales ou thyroïdiennes, ne pas consommer un CA contenant une préparation à base de cette partie de plante.</text:p>
          </table:table-cell>
          <table:table-cell office:value-type="string">
            <text:p>*En cas de prise d’un traitement à visée thyroïdienne, ne pas consommer un CA contenant une préparation à base de cette partie de plante. </text:p>
            <text:p>* Un rapport de cas d'hyperthyroïdie a été publié chez un patient diagnostiqué avec un trouble bipolaire et sous traitement au lithium.</text:p>
          </table:table-cell>
          <table:table-cell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Fumaria officinalis</text:span><text:span text:style-name="T4"> L.</text:span></text:p>
          </table:table-cell>
          <table:table-cell office:value-type="string">
            <text:p>Fumeterre officinale</text:p>
          </table:table-cell>
          <table:table-cell table:style-name="ce9" office:value-type="string">
            <text:p>Papaveraceae</text:p>
          </table:table-cell>
          <table:table-cell table:style-name="ce9" office:value-type="string">
            <text:p>infusion</text:p>
          </table:table-cell>
          <table:table-cell table:style-name="ce9" office:value-type="string">
            <text:p>cholérétique, dépurative</text:p>
          </table:table-cell>
          <table:table-cell table:style-name="ce9" office:value-type="string">
            <text:p>troubles hépato-biliaires</text:p>
          </table:table-cell>
          <table:table-cell office:value-type="string">
            <text:p>Parties aériennes</text:p>
          </table:table-cell>
          <table:table-cell office:value-type="string">
            <text:p>En cas d’obstruction biliaire ou d’insuffisance hépatique, ne pas consommer un CA contenant une préparation à base de cette partie de plante.</text:p>
          </table:table-cell>
          <table:table-cell table:style-name="ce2" office:value-type="string">
            <text:p>-</text:p>
          </table:table-cell>
          <table:table-cell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Gentiana lutea </text:span><text:span text:style-name="T4">L.</text:span></text:p>
          </table:table-cell>
          <table:table-cell office:value-type="string">
            <text:p>Grande gentiane, Gentiane jaune</text:p>
          </table:table-cell>
          <table:table-cell office:value-type="string">
            <text:p>Gentianaceae</text:p>
          </table:table-cell>
          <table:table-cell office:value-type="string">
            <text:p>infusion</text:p>
          </table:table-cell>
          <table:table-cell office:value-type="string">
            <text:p>tonique amère, digestive</text:p>
          </table:table-cell>
          <table:table-cell office:value-type="string">
            <text:p>manque d’appétit, digestion lente</text:p>
          </table:table-cell>
          <table:table-cell office:value-type="string">
            <text:p>Racine, rhizome</text:p>
          </table:table-cell>
          <table:table-cell office:value-type="string">
            <text:p>-</text:p>
          </table:table-cell>
          <table:table-cell table:style-name="ce2" office:value-type="string">
            <text:p>-</text:p>
          </table:table-cell>
          <table:table-cell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7">
          <table:table-cell office:value-type="string">
            <text:p><text:span text:style-name="T3">Ginkgo biloba </text:span><text:span text:style-name="T4">L.</text:span></text:p>
          </table:table-cell>
          <table:table-cell office:value-type="string">
            <text:p>Ginkgo, Arbre des pagodes, Arbre aux quarante écus</text:p>
          </table:table-cell>
          <table:table-cell table:style-name="ce9" office:value-type="string">
            <text:p>Ginkgoaceae</text:p>
          </table:table-cell>
          <table:table-cell table:style-name="ce9" office:value-type="string">
            <text:p>extrait, gélules</text:p>
          </table:table-cell>
          <table:table-cell table:style-name="ce9" office:value-type="string">
            <text:p>vasodilatatrice, antioxydante</text:p>
          </table:table-cell>
          <table:table-cell table:style-name="ce9" office:value-type="string">
            <text:p>troubles circulatoires, mémoire</text:p>
          </table:table-cell>
          <table:table-cell office:value-type="string">
            <text:p>Feuille, graine grillée</text:p>
          </table:table-cell>
          <table:table-cell office:value-type="string">
            <text:p>*  En cas d’épilepsie, ne pas consommer de CA contenant une préparation à base de cette partie de plante. </text:p>
            <text:p>*  En cas d’acte interventionnel invasif programmé, ne pas consommer de CA contenant une préparation à base de cette partie de plante.</text:p>
          </table:table-cell>
          <table:table-cell office:value-type="string">
            <text:p>Augmente les effets des médicaments anticoagulants et antiagrégants notamment les dérivés coumariniques de synthèse. En cas de prise concomitante d’anticoagulants ou antiagrégants plaquettaires, consulter un médecin. <text:s/></text:p>
          </table:table-cell>
          <table:table-cell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7">
          <table:table-cell office:value-type="string">
            <text:p><text:span text:style-name="T3">Glycyrrhiza glabra </text:span><text:span text:style-name="T4">L. et Glycyrrhiza uralensis Fisch</text:span></text:p>
          </table:table-cell>
          <table:table-cell office:value-type="string">
            <text:p>Réglisse</text:p>
          </table:table-cell>
          <table:table-cell office:value-type="string">
            <text:p>Fabaceae</text:p>
          </table:table-cell>
          <table:table-cell office:value-type="string">
            <text:p>infusion, extrait</text:p>
          </table:table-cell>
          <table:table-cell office:value-type="string">
            <text:p>anti-inflammatoire, expectorante, adoucissante</text:p>
          </table:table-cell>
          <table:table-cell office:value-type="string">
            <text:p>toux, gastrite, ulcère léger</text:p>
          </table:table-cell>
          <table:table-cell office:value-type="string">
            <text:p>Racine, rhizome, stolon</text:p>
          </table:table-cell>
          <table:table-cell office:value-type="string">
            <text:p>*  En cas d’hypertension artérielle, de pathologies cardiaques ou rénales, d’insuffisance hépatique, et de tout trouble de l’équilibre hydro-électrolytique, ne pas consommer de CA contenant une préparation à base de cette partie de plante. </text:p>
            <text:p>*  En cas de prise de médicaments diurétiques, antihypertenseurs, hétérosides cardiotoniques, corticoïdes, laxatifs stimulants ou d'autres traitements pouvant perturber l'équilibre hydro-électrolytique, ne pas consommer de CA contenant une préparation à base de cette partie de plante.</text:p>
          </table:table-cell>
          <table:table-cell office:value-type="string">
            <text:p>Interactions de la glycyrrhizine et de son métabolite intestinal l’acide 18β-glycyrrhétinique avec les médicaments qui interfèrent avec l’équilibre hydro-électrolytique.</text:p>
          </table:table-cell>
          <table:table-cell office:value-type="string">
            <text:p>En raison de la présence de glycyrrhizine, et des risques chez la femme enceinte ou allaitante, la consommation de CA contenant une préparation à base de cette partie de plante est formellement contre-indiquée</text:p>
          </table:table-cell>
          <table:table-cell office:value-type="string">
            <text:p>En raison de la présence de glycyrrhizine, avant l’âge de 18 ans, la consommation un CA contenant une préparation à base de cette partie de plante est formellement contre-indiquée. Réservé à l’adulte </text:p>
          </table:table-cell>
        </table:table-row>
        <table:table-row table:style-name="ro1">
          <table:table-cell office:value-type="string">
            <text:p><text:span text:style-name="T3">Grindelia robusta </text:span><text:span text:style-name="T4">Nutt. Et Grindelia camporum Greene (syn. de Grindelia hirsutula Hook. &amp; Arn.) et Grindelia squarrosa (Pursh) Dunal</text:span></text:p>
          </table:table-cell>
          <table:table-cell office:value-type="string">
            <text:p>Grindélia robuste</text:p>
          </table:table-cell>
          <table:table-cell table:style-name="ce9" office:value-type="string">
            <text:p>Asteraceae</text:p>
          </table:table-cell>
          <table:table-cell table:style-name="ce9" office:value-type="string">
            <text:p>infusion, extrait</text:p>
          </table:table-cell>
          <table:table-cell table:style-name="ce9" office:value-type="string">
            <text:p>antitussive, antispasmodique</text:p>
          </table:table-cell>
          <table:table-cell table:style-name="ce9" office:value-type="string">
            <text:p>toux grasse, bronchites</text:p>
          </table:table-cell>
          <table:table-cell office:value-type="string">
            <text:p>Parties aériennes</text:p>
          </table:table-cell>
          <table:table-cell office:value-type="string">
            <text:p>En cas d'allergie croisée connue, en particulier aux plantes de la famille des Asteraceae, ne pas consommer un CA contenant une préparation à base de cette partie de plante.</text:p>
          </table:table-cell>
          <table:table-cell table:style-name="ce2" office:value-type="string">
            <text:p>-</text:p>
          </table:table-cell>
          <table:table-cell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Hamamelis virginiana </text:span><text:span text:style-name="T4">L.</text:span></text:p>
          </table:table-cell>
          <table:table-cell office:value-type="string">
            <text:p>Hamamélis de Virginie</text:p>
          </table:table-cell>
          <table:table-cell office:value-type="string">
            <text:p>Hamamelidaceae</text:p>
          </table:table-cell>
          <table:table-cell office:value-type="string">
            <text:p>infusion, usage externe</text:p>
          </table:table-cell>
          <table:table-cell office:value-type="string">
            <text:p>astringente, veinotonique</text:p>
          </table:table-cell>
          <table:table-cell office:value-type="string">
            <text:p>varices, hémorroïdes</text:p>
          </table:table-cell>
          <table:table-cell office:value-type="string">
            <text:p>Feuille, écorce</text:p>
          </table:table-cell>
          <table:table-cell office:value-type="string">
            <text:p>-</text:p>
          </table:table-cell>
          <table:table-cell table:style-name="ce2" office:value-type="string">
            <text:p>-</text:p>
          </table:table-cell>
          <table:table-cell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2 ans, éviter de consommer un CA contenant une préparation à base de cette partie de plante. Réservé à l’adulte.</text:p>
          </table:table-cell>
        </table:table-row>
        <table:table-row table:style-name="ro1">
          <table:table-cell office:value-type="string">
            <text:p><text:span text:style-name="T3">Harpagophytum procumbens </text:span><text:span text:style-name="T4">(Burch.) DC. ex Meisn. Et Harpagophytum zeyheri Decne.</text:span></text:p>
          </table:table-cell>
          <table:table-cell office:value-type="string">
            <text:p>Harpagophyton, Griffe du diable</text:p>
          </table:table-cell>
          <table:table-cell table:style-name="ce9" office:value-type="string">
            <text:p>Pedaliaceae</text:p>
          </table:table-cell>
          <table:table-cell table:style-name="ce9" office:value-type="string">
            <text:p>extrait, gélules</text:p>
          </table:table-cell>
          <table:table-cell table:style-name="ce9" office:value-type="string">
            <text:p>anti-inflammatoire, antalgique</text:p>
          </table:table-cell>
          <table:table-cell table:style-name="ce9" office:value-type="string">
            <text:p>douleurs articulaires, arthrose</text:p>
          </table:table-cell>
          <table:table-cell office:value-type="string">
            <text:p>Organes souterrains</text:p>
          </table:table-cell>
          <table:table-cell office:value-type="string">
            <text:p>En cas d’ulcère gastro-duodénal ou de troubles biliaires (calculs biliaires), ne pas consommer un CA contenant une préparation à base de cette partie de plante.</text:p>
          </table:table-cell>
          <table:table-cell table:style-name="ce2" office:value-type="string">
            <text:p>-</text:p>
          </table:table-cell>
          <table:table-cell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8">
          <table:table-cell office:value-type="string">
            <text:p><text:span text:style-name="T3">Hedera helix </text:span><text:span text:style-name="T4">L.</text:span></text:p>
          </table:table-cell>
          <table:table-cell office:value-type="string">
            <text:p>Lierre grimpant</text:p>
          </table:table-cell>
          <table:table-cell office:value-type="string">
            <text:p>Araliaceae</text:p>
          </table:table-cell>
          <table:table-cell office:value-type="string">
            <text:p>sirop, extrait</text:p>
          </table:table-cell>
          <table:table-cell office:value-type="string">
            <text:p>expectorante, antitussive</text:p>
          </table:table-cell>
          <table:table-cell office:value-type="string">
            <text:p>toux grasse, bronchites</text:p>
          </table:table-cell>
          <table:table-cell office:value-type="string">
            <text:p>Feuille</text:p>
          </table:table-cell>
          <table:table-cell office:value-type="string">
            <text:p><text:span text:style-name="T5">En cas d'allergie croisée connue (en particulier aux plantes de la famille des Araliaceae), ne pas consommer un CA contenant une préparation à base de cette partie de plante. </text:span></text:p>
            <text:p>En cas de gastrite ou d’ulcère gastrique, ne pas consommer un complément alimentaire contenant une préparation à base de cette plante. Ne pas dépasser les doses recommandées. </text:p>
          </table:table-cell>
          <table:table-cell table:style-name="ce2" office:value-type="string">
            <text:p>-</text:p>
          </table:table-cell>
          <table:table-cell office:value-type="string">
            <text:p>En l’absence de données, chez la femme enceinte ou allaitante, éviter de consommer un CA contenant une préparation à base de cette partie de plante </text:p>
          </table:table-cell>
          <table:table-cell table:style-name="ce15" office:value-type="string">
            <text:p>Avant l’âge de 4 ans, ne pas de consommer de CA contenant une préparation à base de cette partie de plante. </text:p>
            <text:p><text:span text:style-name="T4">A partir de 2 ans:</text:span><text:span text:style-name="T5"> </text:span></text:p>
            <text:p>• 2-5 ans : </text:p>
            <text:p>o Extraits aqueux et hydroalcooliques faibles &lt; 30 % éthanol: 24 à 288 mg équivalent plante sèche/j. </text:p>
            <text:p>o Extraits hydroalcooliques forts (mais &lt; 60 % éthanol) : 42 à 204 mg équivalent plante sèche/j.</text:p>
            <text:p>• 6-11 ans : </text:p>
            <text:p>o Extraits aqueux ethanoliques faibles &lt; 30 % éthanol : 44 à 560 mg équivalent plante sèche/j. </text:p>
            <text:p>o <text:s/>Extraits hydroalcooliques forts : 42 à 300 mg équivalent plante sèche/j.</text:p>
            <text:p><text:s/></text:p>
          </table:table-cell>
        </table:table-row>
        <table:table-row table:style-name="ro7">
          <table:table-cell office:value-type="string">
            <text:p><text:span text:style-name="T3">Helichrysum arenarium </text:span><text:span text:style-name="T4">(L.) Moench.</text:span></text:p>
          </table:table-cell>
          <table:table-cell office:value-type="string">
            <text:p>Immortelle des sables</text:p>
          </table:table-cell>
          <table:table-cell table:style-name="ce9" office:value-type="string">
            <text:p>Asteraceae</text:p>
          </table:table-cell>
          <table:table-cell table:style-name="ce9" office:value-type="string">
            <text:p>infusion</text:p>
          </table:table-cell>
          <table:table-cell table:style-name="ce9" office:value-type="string">
            <text:p>cholérétique, digestive</text:p>
          </table:table-cell>
          <table:table-cell table:style-name="ce9" office:value-type="string">
            <text:p>troubles hépatiques légers</text:p>
          </table:table-cell>
          <table:table-cell office:value-type="string">
            <text:p>Fleur</text:p>
          </table:table-cell>
          <table:table-cell office:value-type="string">
            <text:p>* En cas d’obstructions biliaires ou de maladie hépatique, ne pas consommer un CA contenant une préparation à base de cette partie de plante. </text:p>
            <text:p>* En cas d'allergie croisée connue, en particulier aux plantes de la famille des Asteraceae, ne pas consommer de CA contenant une préparation à base de cette partie de plante.</text:p>
          </table:table-cell>
          <table:table-cell table:style-name="ce2" office:value-type="string">
            <text:p>-</text:p>
          </table:table-cell>
          <table:table-cell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7">
          <table:table-cell office:value-type="string">
            <text:p><text:span text:style-name="T3">Hieracium pilosella </text:span><text:span text:style-name="T4">L.</text:span></text:p>
          </table:table-cell>
          <table:table-cell office:value-type="string">
            <text:p>Epervière piloselle</text:p>
          </table:table-cell>
          <table:table-cell office:value-type="string">
            <text:p>Asteraceae</text:p>
          </table:table-cell>
          <table:table-cell office:value-type="string">
            <text:p>infusion</text:p>
          </table:table-cell>
          <table:table-cell office:value-type="string">
            <text:p>diurétique, drainante</text:p>
          </table:table-cell>
          <table:table-cell office:value-type="string">
            <text:p>rétention d’eau, œdèmes</text:p>
          </table:table-cell>
          <table:table-cell office:value-type="string">
            <text:p>Toutes parties</text:p>
          </table:table-cell>
          <table:table-cell office:value-type="string">
            <text:p>* En cas d’insuffisance cardiaque ou rénale œdèmateuses, ne pas consommer un CA contenant une préparation à base de cette partie de plante. </text:p>
            <text:p>* En cas d'allergie croisée connue, en particulier aux plantes de la famille des Asteraceae, ne pas consommer un CA contenant une préparation à base de cette partie de plante.</text:p>
          </table:table-cell>
          <table:table-cell table:style-name="ce2" office:value-type="string">
            <text:p>-</text:p>
          </table:table-cell>
          <table:table-cell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Humulus lupulus </text:span><text:span text:style-name="T4">L.</text:span></text:p>
          </table:table-cell>
          <table:table-cell office:value-type="string">
            <text:p>Houblon</text:p>
          </table:table-cell>
          <table:table-cell table:style-name="ce9" office:value-type="string">
            <text:p>Cannabaceae</text:p>
          </table:table-cell>
          <table:table-cell table:style-name="ce9" office:value-type="string">
            <text:p>infusion, extrait</text:p>
          </table:table-cell>
          <table:table-cell table:style-name="ce9" office:value-type="string">
            <text:p>sédative, anxiolytique</text:p>
          </table:table-cell>
          <table:table-cell table:style-name="ce9" office:value-type="string">
            <text:p>troubles du sommeil, nervosité</text:p>
          </table:table-cell>
          <table:table-cell office:value-type="string">
            <text:p>Cône</text:p>
          </table:table-cell>
          <table:table-cell office:value-type="string">
            <text:p>-</text:p>
          </table:table-cell>
          <table:table-cell table:style-name="ce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7">
          <table:table-cell office:value-type="string">
            <text:p><text:span text:style-name="T3">Hypericum perforatum </text:span><text:span text:style-name="T4">L.</text:span></text:p>
          </table:table-cell>
          <table:table-cell office:value-type="string">
            <text:p>Millepertuis </text:p>
          </table:table-cell>
          <table:table-cell office:value-type="string">
            <text:p>Hypericaceae</text:p>
          </table:table-cell>
          <table:table-cell office:value-type="string">
            <text:p>infusion, extrait</text:p>
          </table:table-cell>
          <table:table-cell office:value-type="string">
            <text:p>antidépressive légère, sédative</text:p>
          </table:table-cell>
          <table:table-cell office:value-type="string">
            <text:p>dépression légère, anxiété</text:p>
          </table:table-cell>
          <table:table-cell office:value-type="string">
            <text:p>Non précisée (DGCCRF, 2019) </text:p>
          </table:table-cell>
          <table:table-cell office:value-type="string">
            <text:p>Eviter de s’exposer au soleil après la consommation un CA contenant une préparation à base de cette partie de plante. <text:s/>Utiliser un protection solaire cutanée. </text:p>
          </table:table-cell>
          <table:table-cell office:value-type="string">
            <text:p>*Induction enzymatique par le millepertuis de certains cytochromes (CYP3A4, CYP2C9, CYP2C19) et de la P–glycoprotéine, une modification du métabolisme de certains médicaments est observée (dont celui de la ciclosporine, du tacrolimus (par voie systémique), de l'amprenavir, de l'indinavir et des autres inhibiteurs de protéases dans le traitement du VIH, de certains anesthésiques, de l’irinotecan, de l’imatinib et d’autres agents cytostatiques, de la warfarine et des contraceptifs oraux) conduisant généralement à une diminution de l’efficacité du traitement. </text:p>
            <text:p>*Cette éventualité devrait en particulier être précisée pour l’interaction avec les contraceptifs oraux. Pour tout patient sous traitement, demander le conseil d’un professionnel de santé avant la prise de millepertuis.</text:p>
          </table:table-cell>
          <table:table-cell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5">
          <table:table-cell office:value-type="string">
            <text:p><text:span text:style-name="T3">Ilex paraguariensis </text:span><text:span text:style-name="T4">A. St.-Hil.</text:span></text:p>
          </table:table-cell>
          <table:table-cell office:value-type="string">
            <text:p>Maté, Thé du Paraguay, Yerba maté</text:p>
          </table:table-cell>
          <table:table-cell table:style-name="ce9" office:value-type="string">
            <text:p>Aquifoliaceae</text:p>
          </table:table-cell>
          <table:table-cell table:style-name="ce9" office:value-type="string">
            <text:p>infusion</text:p>
          </table:table-cell>
          <table:table-cell table:style-name="ce9" office:value-type="string">
            <text:p>stimulante, tonique</text:p>
          </table:table-cell>
          <table:table-cell table:style-name="ce9" office:value-type="string">
            <text:p>fatigue, baisse de concentration</text:p>
          </table:table-cell>
          <table:table-cell office:value-type="string">
            <text:p>Feuille</text:p>
          </table:table-cell>
          <table:table-cell table:style-name="ce11" office:value-type="string">
            <text:p>En cas d’insuffisance cardiaque ou rénale œdèmateuses, d’ulcère gastro-duodénal, d’hypertension artérielle, ou d’hyperthyroïdie, ne pas consommer un CA contenant une préparation à base de cette partie de plante.</text:p>
          </table:table-cell>
          <table:table-cell table:style-name="ce12" office:value-type="string">
            <text:p>*  Eviter de consommer des médicaments sédatifs ou sympathomimétiques. </text:p>
            <text:p>·      Diminution de l’effet des médicaments sédatifs.</text:p>
            <text:p>·      Augmentation des effets indésirables des médicaments sympathomimétiques (comme l’adrénaline, la dobutamine, la dopamine, la dopexamine, l’isoprénaline, la noradrénaline, la phényléphrine).</text:p>
            <text:p/>
            <text:p>* En cas de traitement concomitant par un médicament Inhibiteur de la Mono-Amine Oxydase (IMAO), éviter de consommer un complément alimentaire contenant une préparation à base de cette partie de plante.</text:p>
          </table:table-cell>
          <table:table-cell table:style-name="ce14"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Juniperus communis </text:span><text:span text:style-name="T4">L.</text:span></text:p>
          </table:table-cell>
          <table:table-cell office:value-type="string">
            <text:p>Genévrier commun</text:p>
          </table:table-cell>
          <table:table-cell office:value-type="string">
            <text:p>Cupressaceae</text:p>
          </table:table-cell>
          <table:table-cell office:value-type="string">
            <text:p>décoction</text:p>
          </table:table-cell>
          <table:table-cell office:value-type="string">
            <text:p>diurétique, antiseptique urinaire</text:p>
          </table:table-cell>
          <table:table-cell office:value-type="string">
            <text:p>troubles urinaires</text:p>
          </table:table-cell>
          <table:table-cell office:value-type="string">
            <text:p>Faux fruit, cône femelle, racine, bois, résine, jeune pousse</text:p>
          </table:table-cell>
          <table:table-cell table:style-name="ce11" office:value-type="string">
            <text:p>En cas d’insuffisance cardiaque ou rénale œdèmateuses, maladie rénale sévère, y compris néphrite interstitielle infectieuse, pyélite et pyélonéphrite, ne pas consommer un CA contenant une préparation à base de cette partie de plante.</text:p>
          </table:table-cell>
          <table:table-cell table:style-name="ce13" office:value-type="string">
            <text:p>L’utilisation concomitante avec des médicaments diurétiques n’est pas recommandée. </text:p>
          </table:table-cell>
          <table:table-cell table:style-name="ce14"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Lavandula angustifolia </text:span><text:span text:style-name="T4">Mill.</text:span></text:p>
          </table:table-cell>
          <table:table-cell office:value-type="string">
            <text:p>Lavande, Lavande vraie</text:p>
          </table:table-cell>
          <table:table-cell table:style-name="ce9" office:value-type="string">
            <text:p>Lamiaceae</text:p>
          </table:table-cell>
          <table:table-cell table:style-name="ce9" office:value-type="string">
            <text:p>infusion, huile essentielle</text:p>
          </table:table-cell>
          <table:table-cell table:style-name="ce9" office:value-type="string">
            <text:p>calmante, antiseptique</text:p>
          </table:table-cell>
          <table:table-cell table:style-name="ce9" office:value-type="string">
            <text:p>stress, troubles du sommeil</text:p>
          </table:table-cell>
          <table:table-cell office:value-type="string">
            <text:p>Fleur, sommité fleurie</text:p>
          </table:table-cell>
          <table:table-cell table:style-name="ce11" office:value-type="string">
            <text:p>-</text:p>
          </table:table-cell>
          <table:table-cell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7">
          <table:table-cell office:value-type="string">
            <text:p><text:span text:style-name="T3">Leonurus cardiaca </text:span><text:span text:style-name="T4">L.</text:span></text:p>
          </table:table-cell>
          <table:table-cell office:value-type="string">
            <text:p>Agripaume cardiaque</text:p>
          </table:table-cell>
          <table:table-cell office:value-type="string">
            <text:p>Lamiaceae</text:p>
          </table:table-cell>
          <table:table-cell office:value-type="string">
            <text:p>infusion</text:p>
          </table:table-cell>
          <table:table-cell office:value-type="string">
            <text:p>cardiotonique, sédative</text:p>
          </table:table-cell>
          <table:table-cell office:value-type="string">
            <text:p>palpitations, anxiété</text:p>
          </table:table-cell>
          <table:table-cell office:value-type="string">
            <text:p>Parties aériennes</text:p>
          </table:table-cell>
          <table:table-cell table:number-columns-repeated="2" office:value-type="string">
            <text:p>-</text:p>
          </table:table-cell>
          <table:table-cell office:value-type="string">
            <text:p>*En raison de la présence d’alcaloïdes, chez la femme enceinte, la consommation de CA contenant une préparation à base de cette partie de plante est formellement contre-indiquée.</text:p>
            <text:p>*En l’absence de données chez la femme allaitante, éviter de consommer un CA contenant une préparation à base de cette partie de plante.</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Levisticum officinale </text:span><text:span text:style-name="T4">W.D.J. Koch</text:span></text:p>
          </table:table-cell>
          <table:table-cell office:value-type="string">
            <text:p>Céleri perpétuel, Livèche</text:p>
          </table:table-cell>
          <table:table-cell table:style-name="ce9" office:value-type="string">
            <text:p>Apiaceae</text:p>
          </table:table-cell>
          <table:table-cell table:style-name="ce9" office:value-type="string">
            <text:p>infusion, alimentation</text:p>
          </table:table-cell>
          <table:table-cell table:style-name="ce9" office:value-type="string">
            <text:p>diurétique, dépuratif</text:p>
          </table:table-cell>
          <table:table-cell table:style-name="ce9" office:value-type="string">
            <text:p>rétention d’eau, drainage</text:p>
          </table:table-cell>
          <table:table-cell office:value-type="string">
            <text:p>Toutes parties</text:p>
          </table:table-cell>
          <table:table-cell office:value-type="string">
            <text:p>En cas de d'allergie croisée connue, en particulier à la famille des Apiaceae (anis, carvi, céleri, coriandre, aneth) ou à l’anéthole, ne pas consommer un CA contenant une préparation à base de cette partie de plante.</text:p>
          </table:table-cell>
          <table:table-cell office:value-type="string">
            <text:p>-</text:p>
          </table:table-cell>
          <table:table-cell table:style-name="ce14"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Linum usitatissimum </text:span><text:span text:style-name="T4">L.</text:span></text:p>
          </table:table-cell>
          <table:table-cell office:value-type="string">
            <text:p>Lin cultivé</text:p>
          </table:table-cell>
          <table:table-cell office:value-type="string">
            <text:p>Linaceae</text:p>
          </table:table-cell>
          <table:table-cell office:value-type="string">
            <text:p>graines, infusion</text:p>
          </table:table-cell>
          <table:table-cell office:value-type="string">
            <text:p>émolliente, laxative douce</text:p>
          </table:table-cell>
          <table:table-cell office:value-type="string">
            <text:p>constipation, irritation intestinale</text:p>
          </table:table-cell>
          <table:table-cell office:value-type="string">
            <text:p>Graine, huile issue de la graine</text:p>
          </table:table-cell>
          <table:table-cell office:value-type="string">
            <text:p>En cas de trouble de la déglutition, ne pas consommer un CA contenant une préparation à base de cette partie de plante sous forme de graine entière ou broyée (risque de fausse route).</text:p>
          </table:table-cell>
          <table:table-cell office:value-type="string">
            <text:p>Retard à l’absorption de médicaments pris de façon concomitante. En cas de traitement médicamenteux concomitant, consommer un CA contenant une préparation à base de cette partie de plante (graine) à distance du ou des médicaments (au moins 60 minutes d’intervalle).</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7">
          <table:table-cell office:value-type="string">
            <text:p><text:span text:style-name="T3">Marrubium vulgare </text:span><text:span text:style-name="T4">L.</text:span></text:p>
          </table:table-cell>
          <table:table-cell office:value-type="string">
            <text:p>Marrube blanc</text:p>
          </table:table-cell>
          <table:table-cell table:style-name="ce9" office:value-type="string">
            <text:p>Lamiaceae</text:p>
          </table:table-cell>
          <table:table-cell table:style-name="ce9" office:value-type="string">
            <text:p>infusion</text:p>
          </table:table-cell>
          <table:table-cell table:style-name="ce9" office:value-type="string">
            <text:p>expectorante, tonique amère</text:p>
          </table:table-cell>
          <table:table-cell table:style-name="ce9" office:value-type="string">
            <text:p>toux chronique, digestion lente</text:p>
          </table:table-cell>
          <table:table-cell office:value-type="string">
            <text:p>Parties aériennes</text:p>
          </table:table-cell>
          <table:table-cell office:value-type="string">
            <text:p>* En cas d’ulcère gastro-duodénal ou d’obstruction biliaire (calculs biliaires), ne pas consommer un CA contenant une préparation à base de cette partie de plante. </text:p>
            <text:p>* En cas d'allergie croisée connue, en particulier aux plantes de la famille des Lamiaceae, ne pas consommer un CA contenant une préparation à base de cette partie de plante</text:p>
          </table:table-cell>
          <table:table-cell table:style-name="ce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8">
          <table:table-cell office:value-type="string">
            <text:p><text:span text:style-name="T3">Matricaria chamomilla</text:span><text:span text:style-name="T4"> L. (syn. </text:span><text:span text:style-name="T3">Matricaria recutita </text:span><text:span text:style-name="T4">L.)</text:span></text:p>
          </table:table-cell>
          <table:table-cell office:value-type="string">
            <text:p>Matricaire, Matricaire camomille, Camomille vulgaire, Camomille allemande </text:p>
          </table:table-cell>
          <table:table-cell office:value-type="string">
            <text:p>Asteraceae</text:p>
          </table:table-cell>
          <table:table-cell office:value-type="string">
            <text:p>infusion</text:p>
          </table:table-cell>
          <table:table-cell office:value-type="string">
            <text:p>anti-inflammatoire, antispasmodique</text:p>
          </table:table-cell>
          <table:table-cell office:value-type="string">
            <text:p>troubles digestifs, règles douloureuses</text:p>
          </table:table-cell>
          <table:table-cell office:value-type="string">
            <text:p>Toutes parties</text:p>
          </table:table-cell>
          <table:table-cell office:value-type="string">
            <text:p>En cas d'allergie croisée connue, en particulier aux plantes de la famille des Asteraceae, ne pas consommer un CA contenant une préparation à base de cette partie de plante.</text:p>
          </table:table-cell>
          <table:table-cell office:value-type="string">
            <text:p>* Interférence avec les médicaments anti-rejet (un cas clinique après consommation prolongée (2 mois) à des doses élevées après une transplantation rénale)</text:p>
            <text:p>* des interactions basées sur des effets sur le CYP450 ont été rapportées</text:p>
          </table:table-cell>
          <table:table-cell office:value-type="string">
            <text:p>En l’absence de données, chez la femme enceinte ou allaitante, éviter de consommer un CA contenant une préparation à base de cette partie de plante (à l’exception des infusions)</text:p>
          </table:table-cell>
          <table:table-cell office:value-type="string">
            <text:p>o  En l’absence de données, avant l’âge de 6 mois, éviter de consommer un CA contenant une préparation à base de cette partie de plante (cas A). A partir de 6 ans, respecter le type de préparation et un niveau d’exposition inférieur ou équivalent, rapportés ci-dessous. </text:p>
            <text:p>A partir de 6 mois : en infusion <text:s/></text:p>
            <text:p>• 6 mois à 2 ans : 0,5 à 2 g, 2 à 4 fois/j. </text:p>
            <text:p>• 2 ans à 6 ans : 1 à 1,5 g, 2 à 4 fois/j. <text:s/></text:p>
            <text:p>• 6 ans à 12 ans : 1,5 à 3g 2 à 4 fois/j soit 1,5 g à 12 g équivalent plante sèche/j. <text:s/></text:p>
            <text:p/>
            <text:p>Extrait hydroalcoolique 48% : </text:p>
            <text:p>• Enfants 6-12 ans 0,27 à 2,35 g équivalent plante sèche/j.</text:p>
            <text:p/>
          </table:table-cell>
        </table:table-row>
        <table:table-row table:style-name="ro1">
          <table:table-cell office:value-type="string">
            <text:p><text:span text:style-name="T3">Melaleuca alternifolia </text:span><text:span text:style-name="T4">(Maiden &amp; Betche) Cheel</text:span></text:p>
          </table:table-cell>
          <table:table-cell office:value-type="string">
            <text:p>Melaleuca, Arbre à thé, Mélaleuque</text:p>
          </table:table-cell>
          <table:table-cell table:style-name="ce9" office:value-type="string">
            <text:p>Myrtaceae</text:p>
          </table:table-cell>
          <table:table-cell table:style-name="ce9" office:value-type="string">
            <text:p>huile essentielle</text:p>
          </table:table-cell>
          <table:table-cell table:style-name="ce9" office:value-type="string">
            <text:p>antibactérienne, antifongique</text:p>
          </table:table-cell>
          <table:table-cell table:style-name="ce9" office:value-type="string">
            <text:p>infections cutanées</text:p>
          </table:table-cell>
          <table:table-cell office:value-type="string">
            <text:p>Huile essentielle</text:p>
          </table:table-cell>
          <table:table-cell office:value-type="string">
            <text:p>En cas d'allergie croisée connue, en particulier à la colophane, ne pas consommer un CA contenant cette huile essentielle.</text:p>
          </table:table-cell>
          <table:table-cell table:style-name="ce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1">
          <table:table-cell office:value-type="string">
            <text:p><text:span text:style-name="T3">Melilotus officinalis </text:span><text:span text:style-name="T4">(L.) Lam.</text:span></text:p>
          </table:table-cell>
          <table:table-cell office:value-type="string">
            <text:p>Mélilot officinal</text:p>
          </table:table-cell>
          <table:table-cell office:value-type="string">
            <text:p>Fabaceae</text:p>
          </table:table-cell>
          <table:table-cell office:value-type="string">
            <text:p>infusion</text:p>
          </table:table-cell>
          <table:table-cell office:value-type="string">
            <text:p>veinotonique, anticoagulante légère</text:p>
          </table:table-cell>
          <table:table-cell office:value-type="string">
            <text:p>insuffisance veineuse</text:p>
          </table:table-cell>
          <table:table-cell office:value-type="string">
            <text:p>Parties aériennes</text:p>
          </table:table-cell>
          <table:table-cell office:value-type="string">
            <text:p>-</text:p>
          </table:table-cell>
          <table:table-cell table:style-name="ce2" office:value-type="string">
            <text:p>-</text:p>
          </table:table-cell>
          <table:table-cell table:style-name="ce14"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Melissa officinalis </text:span><text:span text:style-name="T4">L.</text:span></text:p>
          </table:table-cell>
          <table:table-cell office:value-type="string">
            <text:p>Mélisse, Mélisse officinale</text:p>
          </table:table-cell>
          <table:table-cell table:style-name="ce9" office:value-type="string">
            <text:p>Lamiaceae</text:p>
          </table:table-cell>
          <table:table-cell table:style-name="ce9" office:value-type="string">
            <text:p>infusion</text:p>
          </table:table-cell>
          <table:table-cell table:style-name="ce9" office:value-type="string">
            <text:p>calmante, antispasmodique</text:p>
          </table:table-cell>
          <table:table-cell table:style-name="ce9" office:value-type="string">
            <text:p>stress, troubles digestifs nerveux</text:p>
          </table:table-cell>
          <table:table-cell office:value-type="string">
            <text:p>Feuille</text:p>
          </table:table-cell>
          <table:table-cell office:value-type="string">
            <text:p>-</text:p>
          </table:table-cell>
          <table:table-cell table:style-name="ce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6">
          <table:table-cell office:value-type="string">
            <text:p><text:span text:style-name="T3">Mentha x piperita </text:span><text:span text:style-name="T4">L.</text:span></text:p>
          </table:table-cell>
          <table:table-cell office:value-type="string">
            <text:p>Menthe poivrée</text:p>
          </table:table-cell>
          <table:table-cell office:value-type="string">
            <text:p>Lamiaceae</text:p>
          </table:table-cell>
          <table:table-cell office:value-type="string">
            <text:p>infusion</text:p>
          </table:table-cell>
          <table:table-cell office:value-type="string">
            <text:p>digestive, antispasmodique</text:p>
          </table:table-cell>
          <table:table-cell office:value-type="string">
            <text:p>ballonnements, nausées</text:p>
          </table:table-cell>
          <table:table-cell office:value-type="string">
            <text:p>Feuille, sommité fleurie</text:p>
          </table:table-cell>
          <table:table-cell office:value-type="string">
            <text:p>* En cas de reflux gastro-oesophagien, d’ulcère gastro-duodénal, de gastrite ou de troubles biliaires (calculs biliaires) et /ou hépatiques, ne pas consommer un CA contenant une préparation à base de cette partie de plante.</text:p>
            <text:p>* En cas d’allergie au menthol, ne pas consommer un CA contenant une préparation à base de cette partie de plante.</text:p>
          </table:table-cell>
          <table:table-cell table:style-name="ce2" office:value-type="string">
            <text:p>-</text:p>
          </table:table-cell>
          <table:table-cell office:value-type="string">
            <text:p>En raison de la présence de pulégone et de menthofurane (cancérogènes), chez la femme enceinte ou allaitante, éviter de consommer un CA contenant une préparation à base de cette partie de plante </text:p>
          </table:table-cell>
          <table:table-cell table:style-name="ce15" office:value-type="string">
            <text:p>En raison de la présence de pulégone et de menthofurane (cancérogènes), avant l’âge de 4 ans, éviter de consommer un CA contenant une préparation à base de cette partie de plante.</text:p>
            <text:p><text:span text:style-name="T4">A partir de 4 ans : en infusion </text:span><text:span text:style-name="T5">: </text:span></text:p>
            <text:p>• 4-11 ans et adolescents, 1,0-2,0g, 3 fois/j.</text:p>
            <text:p><text:s/></text:p>
          </table:table-cell>
        </table:table-row>
        <table:table-row table:style-name="ro1">
          <table:table-cell office:value-type="string">
            <text:p><text:span text:style-name="T3">Oenothera biennis </text:span><text:span text:style-name="T4">L.</text:span></text:p>
          </table:table-cell>
          <table:table-cell office:value-type="string">
            <text:p>Onagre bisanuelle</text:p>
          </table:table-cell>
          <table:table-cell table:style-name="ce9" office:value-type="string">
            <text:p>Onagraceae</text:p>
          </table:table-cell>
          <table:table-cell table:style-name="ce9" office:value-type="string">
            <text:p>huile, gélules</text:p>
          </table:table-cell>
          <table:table-cell table:style-name="ce9" office:value-type="string">
            <text:p>anti-inflammatoire, régulatrice hormonale</text:p>
          </table:table-cell>
          <table:table-cell table:style-name="ce9" office:value-type="string">
            <text:p>syndrome prémenstruel</text:p>
          </table:table-cell>
          <table:table-cell office:value-type="string">
            <text:p>Graine, huile de la graine</text:p>
          </table:table-cell>
          <table:table-cell office:value-type="string">
            <text:p>-</text:p>
          </table:table-cell>
          <table:table-cell table:style-name="ce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1">
          <table:table-cell office:value-type="string">
            <text:p><text:span text:style-name="T3">Olea europaea </text:span><text:span text:style-name="T4">L.</text:span></text:p>
          </table:table-cell>
          <table:table-cell office:value-type="string">
            <text:p>Olivier</text:p>
          </table:table-cell>
          <table:table-cell office:value-type="string">
            <text:p>Oleaceae</text:p>
          </table:table-cell>
          <table:table-cell office:value-type="string">
            <text:p>infusion, extrait</text:p>
          </table:table-cell>
          <table:table-cell office:value-type="string">
            <text:p>hypotensive, antioxydante</text:p>
          </table:table-cell>
          <table:table-cell office:value-type="string">
            <text:p>hypertension légère</text:p>
          </table:table-cell>
          <table:table-cell office:value-type="string">
            <text:p>Feuille, fruit</text:p>
          </table:table-cell>
          <table:table-cell office:value-type="string">
            <text:p>En cas d’insuffisance cardiaque ou rénale, ne pas consommer un CA contenant une préparation à base de cette partie de plante.</text:p>
          </table:table-cell>
          <table:table-cell table:style-name="ce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Ononis spinosa et O. spinosa <text:s/></text:span><text:span text:style-name="T4">subsp. hircina (Jacq.) Gams</text:span></text:p>
          </table:table-cell>
          <table:table-cell office:value-type="string">
            <text:p>Bugrane épineuse, Arrête-bœuf</text:p>
          </table:table-cell>
          <table:table-cell table:style-name="ce9" office:value-type="string">
            <text:p>Fabaceae</text:p>
          </table:table-cell>
          <table:table-cell table:style-name="ce9" office:value-type="string">
            <text:p>décoction</text:p>
          </table:table-cell>
          <table:table-cell table:style-name="ce9" office:value-type="string">
            <text:p>diurétique</text:p>
          </table:table-cell>
          <table:table-cell table:style-name="ce9" office:value-type="string">
            <text:p>troubles urinaires</text:p>
          </table:table-cell>
          <table:table-cell office:value-type="string">
            <text:p>Racine, jeune pousse cuite</text:p>
          </table:table-cell>
          <table:table-cell office:value-type="string">
            <text:p>En cas d’insuffisance cardiaque ou rénale œdèmateuses, ne pas consommer un CA contenant une préparation à base de cette partie de plante.</text:p>
          </table:table-cell>
          <table:table-cell table:style-name="ce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1">
          <table:table-cell office:value-type="string">
            <text:p><text:span text:style-name="T3">Origanum dictamnus </text:span><text:span text:style-name="T4">L.</text:span></text:p>
          </table:table-cell>
          <table:table-cell office:value-type="string">
            <text:p>Dictame de Crête</text:p>
          </table:table-cell>
          <table:table-cell office:value-type="string">
            <text:p>Lamiaceae</text:p>
          </table:table-cell>
          <table:table-cell office:value-type="string">
            <text:p>infusion</text:p>
          </table:table-cell>
          <table:table-cell office:value-type="string">
            <text:p>digestive, antispasmodique</text:p>
          </table:table-cell>
          <table:table-cell office:value-type="string">
            <text:p>troubles digestifs</text:p>
          </table:table-cell>
          <table:table-cell office:value-type="string">
            <text:p>Parties aériennes</text:p>
          </table:table-cell>
          <table:table-cell office:value-type="string">
            <text:p>En cas d'allergie croisée connue en particulier aux plantes de la famille des Lamiaceae, ne pas consommer un CA contenant une préparation à base de cette partie de plante.</text:p>
          </table:table-cell>
          <table:table-cell table:style-name="ce2" office:value-type="string">
            <text:p>-</text:p>
          </table:table-cell>
          <table:table-cell table:style-name="ce14"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Origanum majorana </text:span><text:span text:style-name="T4">L.</text:span></text:p>
          </table:table-cell>
          <table:table-cell office:value-type="string">
            <text:p>Marjolaine, Marjolaine à coquille</text:p>
          </table:table-cell>
          <table:table-cell table:style-name="ce9" office:value-type="string">
            <text:p>Lamiaceae</text:p>
          </table:table-cell>
          <table:table-cell table:style-name="ce9" office:value-type="string">
            <text:p>infusion</text:p>
          </table:table-cell>
          <table:table-cell table:style-name="ce9" office:value-type="string">
            <text:p>calmante, digestive</text:p>
          </table:table-cell>
          <table:table-cell table:style-name="ce9" office:value-type="string">
            <text:p>stress, digestion lente</text:p>
          </table:table-cell>
          <table:table-cell office:value-type="string">
            <text:p>Parties aériennes</text:p>
          </table:table-cell>
          <table:table-cell office:value-type="string">
            <text:p>En cas d'allergie croisée connue en particulier aux plantes de la famille des Lamiaceae, ne pas consommer un CA contenant une préparation à base de cette partie de plante.</text:p>
          </table:table-cell>
          <table:table-cell table:style-name="ce2" office:value-type="string">
            <text:p>-</text:p>
          </table:table-cell>
          <table:table-cell table:style-name="ce14"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Orthosiphon aristatus </text:span><text:span text:style-name="T4">(Blume) Miq.</text:span></text:p>
          </table:table-cell>
          <table:table-cell office:value-type="string">
            <text:p>Orthosiphon, Thé de Java, Moustache de chat</text:p>
          </table:table-cell>
          <table:table-cell office:value-type="string">
            <text:p>Lamiaceae</text:p>
          </table:table-cell>
          <table:table-cell office:value-type="string">
            <text:p>infusion</text:p>
          </table:table-cell>
          <table:table-cell office:value-type="string">
            <text:p>diurétique, drainante</text:p>
          </table:table-cell>
          <table:table-cell office:value-type="string">
            <text:p>élimination rénale</text:p>
          </table:table-cell>
          <table:table-cell office:value-type="string">
            <text:p>Feuille</text:p>
          </table:table-cell>
          <table:table-cell office:value-type="string">
            <text:p>En cas d’insuffisance cardiaque ou rénale œdèmateuses, ne pas consommer un CA contenant une préparation à base de cette partie de plante</text:p>
          </table:table-cell>
          <table:table-cell table:style-name="ce2" office:value-type="string">
            <text:p>-</text:p>
          </table:table-cell>
          <table:table-cell table:style-name="ce14"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Panax ginseng </text:span><text:span text:style-name="T4">C.A.Mey.</text:span></text:p>
          </table:table-cell>
          <table:table-cell office:value-type="string">
            <text:p>Ginseng, Mandragore coréenne</text:p>
          </table:table-cell>
          <table:table-cell table:style-name="ce9" office:value-type="string">
            <text:p>Araliaceae</text:p>
          </table:table-cell>
          <table:table-cell table:style-name="ce9" office:value-type="string">
            <text:p>extrait, gélules</text:p>
          </table:table-cell>
          <table:table-cell table:style-name="ce9" office:value-type="string">
            <text:p>adaptogène, tonique</text:p>
          </table:table-cell>
          <table:table-cell table:style-name="ce9" office:value-type="string">
            <text:p>fatigue physique et mentale</text:p>
          </table:table-cell>
          <table:table-cell office:value-type="string">
            <text:p>Racine, feuille, fruit</text:p>
          </table:table-cell>
          <table:table-cell office:value-type="string">
            <text:p>-</text:p>
          </table:table-cell>
          <table:table-cell table:style-name="ce2" office:value-type="string">
            <text:p>-</text:p>
          </table:table-cell>
          <table:table-cell table:style-name="ce14"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Passiflora incarnata </text:span><text:span text:style-name="T4">L. (syn</text:span><text:span text:style-name="T3">. de Passiflora edulis </text:span><text:span text:style-name="T4">Sims</text:span><text:span text:style-name="T3">)</text:span></text:p>
          </table:table-cell>
          <table:table-cell office:value-type="string">
            <text:p>Passiflore</text:p>
          </table:table-cell>
          <table:table-cell office:value-type="string">
            <text:p>Passifloraceae</text:p>
          </table:table-cell>
          <table:table-cell office:value-type="string">
            <text:p>infusion, extrait</text:p>
          </table:table-cell>
          <table:table-cell office:value-type="string">
            <text:p>sédative, anxiolytique</text:p>
          </table:table-cell>
          <table:table-cell office:value-type="string">
            <text:p>insomnie, anxiété</text:p>
          </table:table-cell>
          <table:table-cell office:value-type="string">
            <text:p>Non précisée (DGCCRF, 2019)</text:p>
          </table:table-cell>
          <table:table-cell office:value-type="string">
            <text:p>-</text:p>
          </table:table-cell>
          <table:table-cell table:style-name="ce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7">
          <table:table-cell office:value-type="string">
            <text:p><text:span text:style-name="T3">Paullinia cupana</text:span><text:span text:style-name="T4"> Kunth</text:span></text:p>
          </table:table-cell>
          <table:table-cell office:value-type="string">
            <text:p>Guarana</text:p>
          </table:table-cell>
          <table:table-cell table:style-name="ce9" office:value-type="string">
            <text:p>Sapindaceae</text:p>
          </table:table-cell>
          <table:table-cell table:style-name="ce9" office:value-type="string">
            <text:p>extrait</text:p>
          </table:table-cell>
          <table:table-cell table:style-name="ce9" office:value-type="string">
            <text:p>stimulante</text:p>
          </table:table-cell>
          <table:table-cell table:style-name="ce9" office:value-type="string">
            <text:p>fatigue, baisse d’énergie</text:p>
          </table:table-cell>
          <table:table-cell office:value-type="string">
            <text:p>Graine, pâte de la graine</text:p>
          </table:table-cell>
          <table:table-cell office:value-type="string">
            <text:p>En cas d’ulcère gastro-duodénal et/ou de troubles cardiaques (arythmie, hypertension), et/ou d’hyperthyroïdie, ne pas consommer un CA contenant une préparation à base de cette partie de plante.</text:p>
          </table:table-cell>
          <table:table-cell office:value-type="string">
            <text:p>·      Diminue l’effet des médicaments sédatifs (comme les barbituriques, les benzodiazépines, les opiacés, les anti-histaminiques de type 1).</text:p>
            <text:p>·      Augmente les effets indésirables des médicaments sympathomimétiques (comme l’adrénaline, la dobutamine, la dopamine, la dopexamine, l’isoprénaline, la noradrénaline, la phényléphrine) </text:p>
          </table:table-cell>
          <table:table-cell office:value-type="string">
            <text:p>En raison de la présence de caféine et en l’absence de données, chez la femme enceinte ou allaitante, contre-indication de consommer un CA contenant une préparation à base de cette partie de plante</text:p>
          </table:table-cell>
          <table:table-cell office:value-type="string">
            <text:p>En raison de la présence de caféine et en l’absence de données, avant l’âge de 18 ans, éviter de consommer un CA contenant une préparation à base de cette partie de plante. Réservé à l’adulte </text:p>
          </table:table-cell>
        </table:table-row>
        <table:table-row table:style-name="ro4">
          <table:table-cell office:value-type="string">
            <text:p><text:span text:style-name="T3">Pelargonium sidoides </text:span><text:span text:style-name="T4">DC.</text:span></text:p>
          </table:table-cell>
          <table:table-cell office:value-type="string">
            <text:p>Pélargonium du Cap</text:p>
          </table:table-cell>
          <table:table-cell office:value-type="string">
            <text:p>Geraniaceae</text:p>
          </table:table-cell>
          <table:table-cell office:value-type="string">
            <text:p>extrait</text:p>
          </table:table-cell>
          <table:table-cell office:value-type="string">
            <text:p>antibactérienne, antivirale</text:p>
          </table:table-cell>
          <table:table-cell office:value-type="string">
            <text:p>infections respiratoires</text:p>
          </table:table-cell>
          <table:table-cell office:value-type="string">
            <text:p>Non précisée (DGCCRF, 2019)</text:p>
          </table:table-cell>
          <table:table-cell office:value-type="string">
            <text:p>-</text:p>
          </table:table-cell>
          <table:table-cell table:style-name="ce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6 ans, éviter de consommer un CA contenant une préparation à base de cette partie de plante . A partir de 6 ans, respecter le type de préparation et un niveau d’exposition inférieur ou équivalent, rapportés ci-dessous </text:p>
            <text:p>Extrait hydroalcoolique 11% : </text:p>
            <text:p>• 6 à 12 ans : </text:p>
            <text:p>o Extrait liquide : 0,79-0,83 ml, 3 fois/j.</text:p>
            <text:p>o <text:s/>Extrait sec : 20 mg, 2 fois/j.</text:p>
            <text:p/>
          </table:table-cell>
        </table:table-row>
        <table:table-row table:style-name="ro1">
          <table:table-cell office:value-type="string">
            <text:p><text:span text:style-name="T3">Peumus boldus </text:span><text:span text:style-name="T4">Molina</text:span></text:p>
          </table:table-cell>
          <table:table-cell office:value-type="string">
            <text:p>Boldo</text:p>
          </table:table-cell>
          <table:table-cell table:style-name="ce9" office:value-type="string">
            <text:p>Monimiaceae</text:p>
          </table:table-cell>
          <table:table-cell table:style-name="ce9" office:value-type="string">
            <text:p>infusion</text:p>
          </table:table-cell>
          <table:table-cell table:style-name="ce9" office:value-type="string">
            <text:p>cholérétique, digestive</text:p>
          </table:table-cell>
          <table:table-cell table:style-name="ce9" office:value-type="string">
            <text:p>troubles hépatiques</text:p>
          </table:table-cell>
          <table:table-cell office:value-type="string">
            <text:p>Feuille</text:p>
          </table:table-cell>
          <table:table-cell office:value-type="string">
            <text:p>En cas d’obstruction biliaire ou d’insuffisance hépatique, ne pas consommer un CA contenant une préparation à base de cette partie de plante.</text:p>
          </table:table-cell>
          <table:table-cell table:style-name="ce2" office:value-type="string">
            <text:p>-</text:p>
          </table:table-cell>
          <table:table-cell table:style-name="ce14" office:value-type="string">
            <text:p>En l’absence de données, chez la femme enceinte ou allaitante, contre-indication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Phaseolus vulgaris </text:span><text:span text:style-name="T4">L.</text:span></text:p>
          </table:table-cell>
          <table:table-cell office:value-type="string">
            <text:p>Haricot commun</text:p>
          </table:table-cell>
          <table:table-cell office:value-type="string">
            <text:p>Fabaceae</text:p>
          </table:table-cell>
          <table:table-cell office:value-type="string">
            <text:p>cosse en infusion</text:p>
          </table:table-cell>
          <table:table-cell office:value-type="string">
            <text:p>hypoglycémiante</text:p>
          </table:table-cell>
          <table:table-cell office:value-type="string">
            <text:p>déséquilibres glycémiques légers</text:p>
          </table:table-cell>
          <table:table-cell office:value-type="string">
            <text:p>Fruit (cosse), graine</text:p>
          </table:table-cell>
          <table:table-cell office:value-type="string">
            <text:p>-</text:p>
          </table:table-cell>
          <table:table-cell table:style-name="ce2" office:value-type="string">
            <text:p>-</text:p>
          </table:table-cell>
          <table:table-cell table:style-name="ce14"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Pimpinella anisum </text:span><text:span text:style-name="T4">L.</text:span></text:p>
          </table:table-cell>
          <table:table-cell office:value-type="string">
            <text:p>Anis</text:p>
          </table:table-cell>
          <table:table-cell table:style-name="ce9" office:value-type="string">
            <text:p>Apiaceae</text:p>
          </table:table-cell>
          <table:table-cell table:style-name="ce9" office:value-type="string">
            <text:p>infusion</text:p>
          </table:table-cell>
          <table:table-cell table:style-name="ce9" office:value-type="string">
            <text:p>carminatif, antispasmodique</text:p>
          </table:table-cell>
          <table:table-cell table:style-name="ce9" office:value-type="string">
            <text:p>ballonnements</text:p>
          </table:table-cell>
          <table:table-cell office:value-type="string">
            <text:p>Fruit</text:p>
          </table:table-cell>
          <table:table-cell office:value-type="string">
            <text:p>-</text:p>
          </table:table-cell>
          <table:table-cell table:style-name="ce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5">
          <table:table-cell office:value-type="string">
            <text:p><text:span text:style-name="T3">Plantago afra </text:span><text:span text:style-name="T4">L.</text:span></text:p>
          </table:table-cell>
          <table:table-cell office:value-type="string">
            <text:p>Psyllium</text:p>
          </table:table-cell>
          <table:table-cell office:value-type="string">
            <text:p>Plantaginaceae</text:p>
          </table:table-cell>
          <table:table-cell office:value-type="string">
            <text:p>graines</text:p>
          </table:table-cell>
          <table:table-cell office:value-type="string">
            <text:p>laxative mécanique</text:p>
          </table:table-cell>
          <table:table-cell office:value-type="string">
            <text:p>constipation chronique</text:p>
          </table:table-cell>
          <table:table-cell office:value-type="string">
            <text:p>Graine</text:p>
          </table:table-cell>
          <table:table-cell office:value-type="string">
            <text:p>* En cas de saignement rectal non diagnostiqué et incapacité à déféquer liés à l'utilisation d'un laxatif, ne pas consommer un CA contenant une préparation à base de cette partie de plante.</text:p>
            <text:p>* En cas de rétrécissement anormal du tractus gastro-intestinal, en cas de maladies de l'œsophage et du cardia, un blocage intestinal potentiel ou existant, une paralysie de l'intestin ou un mégacôlon, ne pas consommer un CA contenant une préparation à base de cette partie de plante.</text:p>
            <text:p>* En cas de trouble de la déglutition, ne pas consommer un CA contenant une préparation à base de cette partie de plante sous forme de graine entière ou broyée (risque de fausse route).</text:p>
          </table:table-cell>
          <table:table-cell office:value-type="string">
            <text:p>* Risque d'obstruction gastro-intestinale Ne pas consommer un CA contenant une préparation à base de cette partie de plante avec des médicaments connus pour inhiber les mouvements péristaltiques (par exemple, les opioïdes).</text:p>
            <text:p>* <text:s/>Retard à l'absorption des minéraux, comme le calcium, le fer et le zinc, des vitamines, comme la vitamine B12, et des médicaments, en particulier des hétérosides cardiotoniques, des dérivés de la coumarine, et du lithium. Consommer un CA contenant cette plante à distance de médicaments (au moins 60 minutes d’intervalle). <text:s/></text:p>
          </table:table-cell>
          <table:table-cell office:value-type="string">
            <text:p>En l’absence de données, chez la femme enceinte ou allaitante, éviter de consommer un CA contenant une préparation à base de cette partie de plante</text:p>
          </table:table-cell>
          <table:table-cell office:value-type="string">
            <text:p><text:s/>En l’absence de données, avant l’âge de 6 ans, éviter de consommer un CA contenant une préparation à base de cette partie de plante. A partir de 6 ans, respecter le type de préparation et un niveau d’exposition inférieur ou équivalent, rapportés ci-dessous. </text:p>
            <text:p>A partir de 6 ans : </text:p>
            <text:p>• 6-12 ans : 12 à 25 g/j. </text:p>
            <text:p>• &gt; 12 ans, adultes : 25-40 g/j graine entière, avec ou sans tégument, ou en poudre (apport hydrique suffisant).</text:p>
            <text:p/>
          </table:table-cell>
        </table:table-row>
        <table:table-row table:style-name="ro1">
          <table:table-cell office:value-type="string">
            <text:p><text:span text:style-name="T3">Plantago lanceolata </text:span><text:span text:style-name="T4">L.</text:span></text:p>
          </table:table-cell>
          <table:table-cell office:value-type="string">
            <text:p>Plantain lancéolé</text:p>
          </table:table-cell>
          <table:table-cell table:style-name="ce9" office:value-type="string">
            <text:p>Plantaginaceae</text:p>
          </table:table-cell>
          <table:table-cell table:style-name="ce9" office:value-type="string">
            <text:p>infusion</text:p>
          </table:table-cell>
          <table:table-cell table:style-name="ce9" office:value-type="string">
            <text:p>anti-inflammatoire, expectorante</text:p>
          </table:table-cell>
          <table:table-cell table:style-name="ce9" office:value-type="string">
            <text:p>toux, irritations respiratoires</text:p>
          </table:table-cell>
          <table:table-cell office:value-type="string">
            <text:p>Feuille</text:p>
          </table:table-cell>
          <table:table-cell office:value-type="string">
            <text:p>-</text:p>
          </table:table-cell>
          <table:table-cell table:style-name="ce2" office:value-type="string">
            <text:p>-</text:p>
          </table:table-cell>
          <table:table-cell table:style-name="ce14" office:value-type="string">
            <text:p>En l’absence de données, chez la femme enceinte ou allaitante, éviter de consommer un CA contenant une préparation à base de cette partie de plante </text:p>
          </table:table-cell>
          <table:table-cell office:value-type="string">
            <text:p>o  En l’absence de données, avant l’âge de 3 ans, éviter de consommer un CA contenant une préparation à base de cette partie de plante . </text:p>
          </table:table-cell>
        </table:table-row>
        <table:table-row table:style-name="ro5">
          <table:table-cell office:value-type="string">
            <text:p><text:span text:style-name="T3">Plantago ovata </text:span><text:span text:style-name="T4">Forsk.</text:span></text:p>
          </table:table-cell>
          <table:table-cell office:value-type="string">
            <text:p>Ispaghul</text:p>
          </table:table-cell>
          <table:table-cell office:value-type="string">
            <text:p>Plantaginaceae</text:p>
          </table:table-cell>
          <table:table-cell office:value-type="string">
            <text:p>graines</text:p>
          </table:table-cell>
          <table:table-cell office:value-type="string">
            <text:p>laxative mécanique</text:p>
          </table:table-cell>
          <table:table-cell office:value-type="string">
            <text:p>constipation, régulation du transit</text:p>
          </table:table-cell>
          <table:table-cell office:value-type="string">
            <text:p>Graine, Tégument de la graine</text:p>
          </table:table-cell>
          <table:table-cell office:value-type="string">
            <text:p>* En cas de saignement rectal non diagnostiqué et incapacité à déféquer liés à l'utilisation d'un laxatif, ne pas consommer un CA contenant une préparation à base de cette partie de plante. </text:p>
            <text:p>* En cas de rétrécissement anormal du tractus gastro-intestinal, en cas de maladies de l'œsophage et du cardia, un blocage intestinal potentiel ou existant, une paralysie de l'intestin ou un mégacôlon, ne pas consommer un CA contenant une préparation à base de cette partie de plante. </text:p>
            <text:p>* En cas de trouble de la déglutition, ne pas consommer un CA contenant une préparation à base de cette partie de plante sous forme de graine entière ou broyée (risque de fausse route).</text:p>
          </table:table-cell>
          <table:table-cell office:value-type="string">
            <text:p>* Risque d'obstruction gastro-intestinale Ne pas consommer un CA contenant une préparation à base de cette partie de plante avec des médicaments connus pour inhiber les mouvements péristaltiques (par exemple, les opioïdes).</text:p>
            <text:p>* <text:s/>Retard à l'absorption des minéraux, comme le calcium, le fer et le zinc, des vitamines, comme la vitamine B12, et des médicaments, en particulier des hétérosides cardiotoniques, des dérivés de la coumarine, et du lithium. Consommer un CA contenant cette plante à distance de médicaments (au moins 60 minutes d’intervalle). <text:s/></text:p>
          </table:table-cell>
          <table:table-cell office:value-type="string">
            <text:p>Chez la femme enceinte ou allaitante, la consommation d’un CA contenant une préparation à base de cette partie de plante est possible si un changement de régime alimentaire s’est révélé inefficace </text:p>
          </table:table-cell>
          <table:table-cell office:value-type="string">
            <text:p>En l’absence de données, avant l’âge de 6 ans, éviter de consommer un CA contenant une préparation à base de cette partie de plante . A partir de 6 ans, respecter le type de préparation et un niveau d’exposition inférieur ou équivalent, rapportés ci-dessous. </text:p>
            <text:p>A partir de 6 ans :</text:p>
            <text:p>• 6-12 ans : 4 à 25 g/j.</text:p>
            <text:p>• &gt; 12 ans, adultes : 8-40 g/j graine entière, avec ou sans tégument, ou en poudre (apport hydrique suffisant).</text:p>
            <text:p/>
          </table:table-cell>
        </table:table-row>
        <table:table-row table:style-name="ro1">
          <table:table-cell office:value-type="string">
            <text:p><text:span text:style-name="T3">Polygonum aviculare </text:span><text:span text:style-name="T4">L.</text:span></text:p>
          </table:table-cell>
          <table:table-cell office:value-type="string">
            <text:p>Renouée des oiseaux, Traînasse</text:p>
          </table:table-cell>
          <table:table-cell table:style-name="ce9" office:value-type="string">
            <text:p>Polygonaceae</text:p>
          </table:table-cell>
          <table:table-cell table:style-name="ce9" office:value-type="string">
            <text:p>infusion</text:p>
          </table:table-cell>
          <table:table-cell table:style-name="ce9" office:value-type="string">
            <text:p>astringente, diurétique</text:p>
          </table:table-cell>
          <table:table-cell table:style-name="ce9" office:value-type="string">
            <text:p>diarrhées légères</text:p>
          </table:table-cell>
          <table:table-cell office:value-type="string">
            <text:p>Parties aériennes, graine</text:p>
          </table:table-cell>
          <table:table-cell office:value-type="string">
            <text:p>En cas d’insuffisance cardiaque ou rénale, ne pas consommer un CA contenant une préparation à base de cette partie de plante.</text:p>
          </table:table-cell>
          <table:table-cell table:style-name="ce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1">
          <table:table-cell office:value-type="string">
            <text:p><text:span text:style-name="T3">Potentilla erecta </text:span><text:span text:style-name="T4">(L.) Raeusch.</text:span></text:p>
          </table:table-cell>
          <table:table-cell office:value-type="string">
            <text:p>Tormentille, Potentille dressée, Potentille officinale, Herbe de sainte Catherine</text:p>
          </table:table-cell>
          <table:table-cell office:value-type="string">
            <text:p>Rosaceae</text:p>
          </table:table-cell>
          <table:table-cell office:value-type="string">
            <text:p>décoction</text:p>
          </table:table-cell>
          <table:table-cell office:value-type="string">
            <text:p>astringente</text:p>
          </table:table-cell>
          <table:table-cell office:value-type="string">
            <text:p>diarrhées</text:p>
          </table:table-cell>
          <table:table-cell office:value-type="string">
            <text:p>Rhizome, racine</text:p>
          </table:table-cell>
          <table:table-cell office:value-type="string">
            <text:p>-</text:p>
          </table:table-cell>
          <table:table-cell office:value-type="string">
            <text:p>En cas de traitement médicamenteux concomitant, consommer le CA contenant cette plante à distance de médicaments (au moins 60 minutes d’intervalle). <text:s/></text:p>
          </table:table-cell>
          <table:table-cell table:style-name="ce14"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7">
          <table:table-cell office:value-type="string">
            <text:p><text:span text:style-name="T3">Primula elatior </text:span><text:span text:style-name="T4">(L.) Hill et Primula veris L.</text:span></text:p>
          </table:table-cell>
          <table:table-cell office:value-type="string">
            <text:p>Primevère officinale</text:p>
          </table:table-cell>
          <table:table-cell table:style-name="ce9" office:value-type="string">
            <text:p>Primulaceae</text:p>
          </table:table-cell>
          <table:table-cell table:style-name="ce9" office:value-type="string">
            <text:p>infusion</text:p>
          </table:table-cell>
          <table:table-cell table:style-name="ce9" office:value-type="string">
            <text:p>expectorante, sédative</text:p>
          </table:table-cell>
          <table:table-cell table:style-name="ce9" office:value-type="string">
            <text:p>toux, troubles du sommeil</text:p>
          </table:table-cell>
          <table:table-cell office:value-type="string">
            <text:p>Fleur, Racine</text:p>
          </table:table-cell>
          <table:table-cell office:value-type="string">
            <text:p>En cas de gastrite ou d’ulcère gastro-duodénal, ne pas consommer un CA contenant une préparation à base de cette plante.</text:p>
            <text:p>En cas d'allergie croisée connue (en particulier aux plantes du genre Primula), ne pas consommer un CA contenant une préparation à base de cette partie de plante.</text:p>
          </table:table-cell>
          <table:table-cell table:style-name="ce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text:p>
            <text:p/>
          </table:table-cell>
        </table:table-row>
        <table:table-row table:style-name="ro1">
          <table:table-cell office:value-type="string">
            <text:p><text:span text:style-name="T3">Prunus africana </text:span><text:span text:style-name="T4">(Hook. f.) Kalkman</text:span></text:p>
          </table:table-cell>
          <table:table-cell office:value-type="string">
            <text:p>Prunier d'Afrique</text:p>
          </table:table-cell>
          <table:table-cell office:value-type="string">
            <text:p>Rosaceae</text:p>
          </table:table-cell>
          <table:table-cell office:value-type="string">
            <text:p>extrait</text:p>
          </table:table-cell>
          <table:table-cell office:value-type="string">
            <text:p>anti-inflammatoire prostatique</text:p>
          </table:table-cell>
          <table:table-cell office:value-type="string">
            <text:p>hypertrophie bénigne de la prostate</text:p>
          </table:table-cell>
          <table:table-cell office:value-type="string">
            <text:p>Ecorce</text:p>
          </table:table-cell>
          <table:table-cell office:value-type="string">
            <text:p>-</text:p>
          </table:table-cell>
          <table:table-cell table:style-name="ce2" office:value-type="string">
            <text:p>-</text:p>
          </table:table-cell>
          <table:table-cell table:style-name="ce14"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Quercus petraea </text:span><text:span text:style-name="T4">(Matt.) Liebl., Quercus pubescens Willd. Et Quercus robur L.</text:span></text:p>
          </table:table-cell>
          <table:table-cell office:value-type="string">
            <text:p>Chêne rouvre, Chêne pubescent et Chêne pédonculé</text:p>
          </table:table-cell>
          <table:table-cell table:style-name="ce9" office:value-type="string">
            <text:p>Fagaceae</text:p>
          </table:table-cell>
          <table:table-cell table:style-name="ce9" office:value-type="string">
            <text:p>décoction, usage externe</text:p>
          </table:table-cell>
          <table:table-cell table:style-name="ce9" office:value-type="string">
            <text:p>astringente</text:p>
          </table:table-cell>
          <table:table-cell table:style-name="ce9" office:value-type="string">
            <text:p>diarrhées, inflammations cutanées</text:p>
          </table:table-cell>
          <table:table-cell office:value-type="string">
            <text:p>Non précisée (DGCCRF, 2019)</text:p>
          </table:table-cell>
          <table:table-cell office:value-type="string">
            <text:p>-</text:p>
          </table:table-cell>
          <table:table-cell office:value-type="string">
            <text:p>Retarde l’absorption de médicaments pris concomitamment En cas de traitement médicamenteux concomitant, <text:s/>consommer le CA contenant cette plante à distance de médicaments (au moins 60 minutes d’intervalle). <text:s/></text:p>
          </table:table-cell>
          <table:table-cell table:style-name="ce14"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3">
          <table:table-cell office:value-type="string">
            <text:p><text:span text:style-name="T3">Rheum officinale </text:span><text:span text:style-name="T4">Baill. Et Rheum palmatum L.</text:span></text:p>
          </table:table-cell>
          <table:table-cell office:value-type="string">
            <text:p>Rhubarbe officinale, Rhubarbe palmée, Rhubarbe de Chine</text:p>
          </table:table-cell>
          <table:table-cell office:value-type="string">
            <text:p>Polygonaceae</text:p>
          </table:table-cell>
          <table:table-cell office:value-type="string">
            <text:p>extrait</text:p>
          </table:table-cell>
          <table:table-cell office:value-type="string">
            <text:p>laxative, digestive</text:p>
          </table:table-cell>
          <table:table-cell office:value-type="string">
            <text:p>constipation occasionnelle</text:p>
          </table:table-cell>
          <table:table-cell office:value-type="string">
            <text:p>Rhizome, racine</text:p>
          </table:table-cell>
          <table:table-cell office:value-type="string">
            <text:p>En cas d’occlusion intestinale, de maladie inflammatoire intestinale aigüe ou chronique, de douleurs abdominales d’origine inexpliqué, d’insuffisance cardiaque ou rénale œdèmateuse, de déshydratation sévère ou d’hypokaliémie, ne pas consommer de CA contenant une préparation à base de cette partie de plante.</text:p>
          </table:table-cell>
          <table:table-cell office:value-type="string">
            <text:p>Effets sur la kaliémie: </text:p>
            <text:p>*Potentialisation de l'effet des médicaments diurétiques sur la kaliémie</text:p>
            <text:p>*Interférence avec les médicaments anti-arythmiques</text:p>
          </table:table-cell>
          <table:table-cell office:value-type="string">
            <text:p>En raison de la présence de dérivés hydroxyanthracéniques, chez la femme enceinte ou allaitante, la consommation de CA contenant une préparation à base de cette partie de plante est formellement contre-indiquée </text:p>
          </table:table-cell>
          <table:table-cell office:value-type="string">
            <text:p>En raison de la présence de dérivés hydroxyanthracéniques, avant l’âge de 12 ans, la consommation de CA contenant une préparation à base de cette partie de plante est formellement contre-indiquée</text:p>
          </table:table-cell>
        </table:table-row>
        <table:table-row table:style-name="ro1">
          <table:table-cell office:value-type="string">
            <text:p><text:span text:style-name="T3">Ribes nigrum </text:span><text:span text:style-name="T4">L.</text:span></text:p>
          </table:table-cell>
          <table:table-cell office:value-type="string">
            <text:p>Groseillier noir, Cassis, Cassissier</text:p>
          </table:table-cell>
          <table:table-cell table:style-name="ce9" office:value-type="string">
            <text:p>Grossulariaceae</text:p>
          </table:table-cell>
          <table:table-cell table:style-name="ce9" office:value-type="string">
            <text:p>infusion, extrait</text:p>
          </table:table-cell>
          <table:table-cell table:style-name="ce9" office:value-type="string">
            <text:p>anti-inflammatoire</text:p>
          </table:table-cell>
          <table:table-cell table:style-name="ce9" office:value-type="string">
            <text:p>douleurs articulaires</text:p>
          </table:table-cell>
          <table:table-cell office:value-type="string">
            <text:p>Feuille, bourgeon de feuille, fruit, graine</text:p>
          </table:table-cell>
          <table:table-cell office:value-type="string">
            <text:p>En cas d’insuffisance cardiaque ou rénale œdémateuses, ne pas consommer un CA contenant une préparation à base de cette partie de plante</text:p>
          </table:table-cell>
          <table:table-cell table:style-name="ce2" office:value-type="string">
            <text:p>-</text:p>
          </table:table-cell>
          <table:table-cell table:style-name="ce14"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Rosmarinus officinalis </text:span><text:span text:style-name="T4">L.</text:span></text:p>
          </table:table-cell>
          <table:table-cell office:value-type="string">
            <text:p>Romarin</text:p>
          </table:table-cell>
          <table:table-cell office:value-type="string">
            <text:p>Lamiaceae</text:p>
          </table:table-cell>
          <table:table-cell office:value-type="string">
            <text:p>infusion</text:p>
          </table:table-cell>
          <table:table-cell office:value-type="string">
            <text:p>stimulante, digestive</text:p>
          </table:table-cell>
          <table:table-cell office:value-type="string">
            <text:p>fatigue, troubles digestifs</text:p>
          </table:table-cell>
          <table:table-cell office:value-type="string">
            <text:p>Feuille, sommité fleurie</text:p>
          </table:table-cell>
          <table:table-cell office:value-type="string">
            <text:p>En cas d’obstruction biliaire ou d’autres troubles de la fonction biliaire, éviter de consommer un CA contenant une préparation à base de cette partie de plante</text:p>
          </table:table-cell>
          <table:table-cell table:style-name="ce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1">
          <table:table-cell office:value-type="string">
            <text:p><text:span text:style-name="T3">Rubus idaeus L</text:span><text:span text:style-name="T4">.</text:span></text:p>
          </table:table-cell>
          <table:table-cell office:value-type="string">
            <text:p>Framboisier commun, Framboisier, Ronce du Mont Ida</text:p>
          </table:table-cell>
          <table:table-cell table:style-name="ce9" office:value-type="string">
            <text:p>Rosaceae</text:p>
          </table:table-cell>
          <table:table-cell table:style-name="ce9" office:value-type="string">
            <text:p>infusion</text:p>
          </table:table-cell>
          <table:table-cell table:style-name="ce9" office:value-type="string">
            <text:p>tonique utérin</text:p>
          </table:table-cell>
          <table:table-cell table:style-name="ce9" office:value-type="string">
            <text:p>troubles menstruels</text:p>
          </table:table-cell>
          <table:table-cell office:value-type="string">
            <text:p>Feuille, fruit, jeune pousse</text:p>
          </table:table-cell>
          <table:table-cell office:value-type="string">
            <text:p>-</text:p>
          </table:table-cell>
          <table:table-cell table:style-name="ce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Ruscus aculeatus </text:span><text:span text:style-name="T4">L.</text:span></text:p>
          </table:table-cell>
          <table:table-cell office:value-type="string">
            <text:p>Fragon épineux, Petit houx</text:p>
          </table:table-cell>
          <table:table-cell office:value-type="string">
            <text:p>Asparagaceae</text:p>
          </table:table-cell>
          <table:table-cell office:value-type="string">
            <text:p>extrait</text:p>
          </table:table-cell>
          <table:table-cell office:value-type="string">
            <text:p>veinotonique</text:p>
          </table:table-cell>
          <table:table-cell office:value-type="string">
            <text:p>jambes lourdes</text:p>
          </table:table-cell>
          <table:table-cell office:value-type="string">
            <text:p>Rhizome, parties aériennes</text:p>
          </table:table-cell>
          <table:table-cell office:value-type="string">
            <text:p>-</text:p>
          </table:table-cell>
          <table:table-cell table:style-name="ce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7">
          <table:table-cell office:value-type="string">
            <text:p><text:span text:style-name="T3">Salix fragilis </text:span><text:span text:style-name="T4">L.et Salix purpurea L.</text:span></text:p>
          </table:table-cell>
          <table:table-cell office:value-type="string">
            <text:p>Saule fragile, Saule cassant et Osier rouge, Saule pourpre</text:p>
          </table:table-cell>
          <table:table-cell table:style-name="ce9" office:value-type="string">
            <text:p>Salicaceae</text:p>
          </table:table-cell>
          <table:table-cell table:style-name="ce9" office:value-type="string">
            <text:p>infusion</text:p>
          </table:table-cell>
          <table:table-cell table:style-name="ce9" office:value-type="string">
            <text:p>antalgique, anti-inflammatoire</text:p>
          </table:table-cell>
          <table:table-cell table:style-name="ce9" office:value-type="string">
            <text:p>douleurs, fièvre</text:p>
          </table:table-cell>
          <table:table-cell office:value-type="string">
            <text:p>Ecorce, feuille</text:p>
          </table:table-cell>
          <table:table-cell office:value-type="string">
            <text:p>* En cas d’ulcère gastro-duodénal, de déficit en glucose-6-phosphate déshydrogénase, de troubles de la coagulation, de maladie hépatique ou rénale, ne pas consommer de CA contenant une préparation à base de cette partie de plante.</text:p>
            <text:p>* En cas d’allergie aux dérivés salicylés et/ou d’intolérance aux anti-inflammatoires non-stéroïdiens, ne pas consommer de CA contenant une préparation à base de cette partie de plante ;</text:p>
          </table:table-cell>
          <table:table-cell office:value-type="string">
            <text:p>En cas de prise concomitante d’anticoagulants et d’antiagrégants plaquettaires, ou de dérivés salicylés et/ou d’anti-inflammatoires non-stéroïdiens, consulter un médecin.</text:p>
          </table:table-cell>
          <table:table-cell office:value-type="string">
            <text:p>En raison de la présence de salicylées, chez la femme enceinte ou allaitante, la consommation de CA contenant une préparation à base de cette partie de plante est formellement contre-indiquée</text:p>
          </table:table-cell>
          <table:table-cell office:value-type="string">
            <text:p>En raison de la présence de salicylées, avant l’âge de 18 ans, la consommation de CA contenant une préparation à base de cette partie de plante est formellement contre-indiquée. Réservé à l’adulte </text:p>
          </table:table-cell>
        </table:table-row>
        <table:table-row table:style-name="ro1">
          <table:table-cell office:value-type="string">
            <text:p><text:span text:style-name="T3">Salvia officinalis </text:span><text:span text:style-name="T4">subsp.</text:span><text:span text:style-name="T3"> lavandulifolia</text:span><text:span text:style-name="T4"> (Vahl)</text:span><text:span text:style-name="T3"> </text:span><text:span text:style-name="T4">Gams</text:span><text:span text:style-name="T3"> (syn. Salvia lavandulifolia </text:span><text:span text:style-name="T4">Vahl)</text:span></text:p>
          </table:table-cell>
          <table:table-cell office:value-type="string">
            <text:p>Sauge officinale</text:p>
          </table:table-cell>
          <table:table-cell office:value-type="string">
            <text:p>Lamiaceae</text:p>
          </table:table-cell>
          <table:table-cell office:value-type="string">
            <text:p>infusion</text:p>
          </table:table-cell>
          <table:table-cell office:value-type="string">
            <text:p>antiseptique, régulatrice hormonale</text:p>
          </table:table-cell>
          <table:table-cell office:value-type="string">
            <text:p>sueurs, troubles digestifs</text:p>
          </table:table-cell>
          <table:table-cell office:value-type="string">
            <text:p>Feuille, parties aériennes</text:p>
          </table:table-cell>
          <table:table-cell table:number-columns-repeated="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Sambucus nigra </text:span><text:span text:style-name="T4">L.</text:span></text:p>
          </table:table-cell>
          <table:table-cell office:value-type="string">
            <text:p>Sureau noir, Sureau commun</text:p>
          </table:table-cell>
          <table:table-cell table:style-name="ce9" office:value-type="string">
            <text:p>Adoxaceae</text:p>
          </table:table-cell>
          <table:table-cell table:style-name="ce9" office:value-type="string">
            <text:p>infusion</text:p>
          </table:table-cell>
          <table:table-cell table:style-name="ce9" office:value-type="string">
            <text:p>fébrifuge, sudorifique</text:p>
          </table:table-cell>
          <table:table-cell table:style-name="ce9" office:value-type="string">
            <text:p>rhumes, fièvre</text:p>
          </table:table-cell>
          <table:table-cell office:value-type="string">
            <text:p>Fleur, fruit mûr, feuille</text:p>
          </table:table-cell>
          <table:table-cell table:number-columns-repeated="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1">
          <table:table-cell office:value-type="string">
            <text:p><text:span text:style-name="T3">Sedum roseum </text:span><text:span text:style-name="T4">(L.) Scop. (syn.</text:span><text:span text:style-name="T3"> Rhodiola rosea </text:span><text:span text:style-name="T4">L.</text:span><text:span text:style-name="T3">)</text:span></text:p>
          </table:table-cell>
          <table:table-cell office:value-type="string">
            <text:p>Rhodiole rose, Orpin rose</text:p>
          </table:table-cell>
          <table:table-cell office:value-type="string">
            <text:p>Crassulaceae</text:p>
          </table:table-cell>
          <table:table-cell office:value-type="string">
            <text:p>extrait</text:p>
          </table:table-cell>
          <table:table-cell office:value-type="string">
            <text:p>adaptogène</text:p>
          </table:table-cell>
          <table:table-cell office:value-type="string">
            <text:p>stress, fatigue mentale</text:p>
          </table:table-cell>
          <table:table-cell office:value-type="string">
            <text:p>Toutes parties</text:p>
          </table:table-cell>
          <table:table-cell table:number-columns-repeated="2" office:value-type="string">
            <text:p>-</text:p>
          </table:table-cell>
          <table:table-cell table:style-name="ce14"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3">
          <table:table-cell office:value-type="string">
            <text:p><text:span text:style-name="T3">Senna alexandrina </text:span><text:span text:style-name="T4">Mill. (syn.</text:span><text:span text:style-name="T3"> Cassia senna </text:span><text:span text:style-name="T4">L.)</text:span></text:p>
          </table:table-cell>
          <table:table-cell office:value-type="string">
            <text:p>Séné d'Alexandrie</text:p>
          </table:table-cell>
          <table:table-cell table:style-name="ce9" office:value-type="string">
            <text:p>Fabaceae</text:p>
          </table:table-cell>
          <table:table-cell table:style-name="ce9" office:value-type="string">
            <text:p>infusion</text:p>
          </table:table-cell>
          <table:table-cell table:style-name="ce9" office:value-type="string">
            <text:p>laxative stimulante</text:p>
          </table:table-cell>
          <table:table-cell table:style-name="ce9" office:value-type="string">
            <text:p>constipation</text:p>
          </table:table-cell>
          <table:table-cell office:value-type="string">
            <text:p>Fruit (gousse), feuille</text:p>
          </table:table-cell>
          <table:table-cell office:value-type="string">
            <text:p>En cas d’occlusion intestinale, de maladie inflammatoire intestinale aigüe ou chronique, de douleurs abdominales d’origine inexpliqué, d’insuffisance cardiaque ou rénale oedemateuse, de déshydratation sévère ou d’hypokaliémie, ne pas consommer de CA contenant une préparation à base de cette partie de plante.</text:p>
          </table:table-cell>
          <table:table-cell office:value-type="string">
            <text:p>Effets sur la kaliémie: </text:p>
            <text:p>*Potentialisation de l'effet des médicaments diurétiques sur la kaliémie</text:p>
            <text:p>*Interférence avec les médicaments anti-arythmiques</text:p>
          </table:table-cell>
          <table:table-cell office:value-type="string">
            <text:p>En raison de la présence de dérivés hydroxyanthracéniques, chez la femme enceinte ou allaitante, la consommation de CA contenant une préparation à base de cette partie de plante est formellement contre-indiquée </text:p>
          </table:table-cell>
          <table:table-cell office:value-type="string">
            <text:p>En raison de la présence de dérivés hydroxyanthracéniques, avant l’âge de 12 ans, la consommation de CA contenant une préparation à base de cette partie de plante est formellement contre-indiquée </text:p>
          </table:table-cell>
        </table:table-row>
        <table:table-row table:style-name="ro1">
          <table:table-cell office:value-type="string">
            <text:p><text:span text:style-name="T3">Serenoa repens </text:span><text:span text:style-name="T4">(W.Bartram) Small</text:span></text:p>
          </table:table-cell>
          <table:table-cell office:value-type="string">
            <text:p>Sabal, Palmier de Floride, Chou palmiste, Palmier de l'Amérique du Nord</text:p>
          </table:table-cell>
          <table:table-cell office:value-type="string">
            <text:p>Arecaceae</text:p>
          </table:table-cell>
          <table:table-cell office:value-type="string">
            <text:p>extrait</text:p>
          </table:table-cell>
          <table:table-cell office:value-type="string">
            <text:p>anti-androgène</text:p>
          </table:table-cell>
          <table:table-cell office:value-type="string">
            <text:p>troubles prostatiques</text:p>
          </table:table-cell>
          <table:table-cell office:value-type="string">
            <text:p>Fruit</text:p>
          </table:table-cell>
          <table:table-cell office:value-type="string">
            <text:p>-</text:p>
          </table:table-cell>
          <table:table-cell office:value-type="string">
            <text:p>En cas de prise concomitante d’un traitement anti-coagulant, ne pas consommer un CA contenant une préparation à base de cette partie de plante. Cas d'interactions suspectées avec la warfarine.</text:p>
          </table:table-cell>
          <table:table-cell table:style-name="ce14"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Sideritis syriaca</text:span><text:span text:style-name="T4"> L., </text:span><text:span text:style-name="T3">Sideritis scardica </text:span><text:span text:style-name="T4">Griseb. ; </text:span><text:span text:style-name="T3">S. clandestina </text:span><text:span text:style-name="T4">(Bory &amp; Chaub.) Hayek ; </text:span><text:span text:style-name="T3">S. raeseri</text:span><text:span text:style-name="T4"> Boiss. &amp; Heldr. </text:span></text:p>
          </table:table-cell>
          <table:table-cell office:value-type="string">
            <text:p>Thé de Crête</text:p>
          </table:table-cell>
          <table:table-cell table:style-name="ce9" office:value-type="string">
            <text:p>Lamiaceae</text:p>
          </table:table-cell>
          <table:table-cell table:style-name="ce9" office:value-type="string">
            <text:p>infusion</text:p>
          </table:table-cell>
          <table:table-cell table:style-name="ce9" office:value-type="string">
            <text:p>antioxydante, digestive</text:p>
          </table:table-cell>
          <table:table-cell table:style-name="ce9" office:value-type="string">
            <text:p>fatigue, digestion lente</text:p>
          </table:table-cell>
          <table:table-cell office:value-type="string">
            <text:p>Partie aérienne (S. syriaca)</text:p>
          </table:table-cell>
          <table:table-cell office:value-type="string">
            <text:p>En cas d'allergie croisée connue en particulier à une plante de la famille des Lamiaceae, ne pas consommer un CA contenant une préparation à base de cette partie de plante.</text:p>
          </table:table-cell>
          <table:table-cell office:value-type="string">
            <text:p>-</text:p>
          </table:table-cell>
          <table:table-cell table:style-name="ce14"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Silybum marianum </text:span><text:span text:style-name="T4">(L.) Gaertn.</text:span></text:p>
          </table:table-cell>
          <table:table-cell office:value-type="string">
            <text:p>Chardon-Marie</text:p>
          </table:table-cell>
          <table:table-cell office:value-type="string">
            <text:p>Asteraceae</text:p>
          </table:table-cell>
          <table:table-cell office:value-type="string">
            <text:p>extrait</text:p>
          </table:table-cell>
          <table:table-cell office:value-type="string">
            <text:p>hépatoprotectrice</text:p>
          </table:table-cell>
          <table:table-cell office:value-type="string">
            <text:p>foie surchargé</text:p>
          </table:table-cell>
          <table:table-cell office:value-type="string">
            <text:p>Fruit</text:p>
          </table:table-cell>
          <table:table-cell office:value-type="string">
            <text:p>En cas d'allergie croisée connue en particulier à la famille des Asteraceae, ne pas consommer un CA contenant une préparation à base de cette partie de plante. </text:p>
          </table:table-cell>
          <table:table-cell office:value-type="string">
            <text:p>-</text:p>
          </table:table-cell>
          <table:table-cell table:style-name="ce14" office:value-type="string">
            <text:p>En l’absence de données, chez la femme enceinte ou allaitante, éviter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Sisymbrium officinale </text:span><text:span text:style-name="T4">(L) Scop.</text:span></text:p>
          </table:table-cell>
          <table:table-cell office:value-type="string">
            <text:p>Sisymbre officinal, Herbe aux chantres, Vélar</text:p>
          </table:table-cell>
          <table:table-cell table:style-name="ce9" office:value-type="string">
            <text:p>Brassicaceae</text:p>
          </table:table-cell>
          <table:table-cell table:style-name="ce9" office:value-type="string">
            <text:p>infusion</text:p>
          </table:table-cell>
          <table:table-cell table:style-name="ce9" office:value-type="string">
            <text:p>adoucissante</text:p>
          </table:table-cell>
          <table:table-cell table:style-name="ce9" office:value-type="string">
            <text:p>enrouement, extinction de voix</text:p>
          </table:table-cell>
          <table:table-cell office:value-type="string">
            <text:p>Parties aériennes</text:p>
          </table:table-cell>
          <table:table-cell table:number-columns-repeated="2" office:value-type="string">
            <text:p>-</text:p>
          </table:table-cell>
          <table:table-cell table:style-name="ce14" office:value-type="string">
            <text:p>En l’absence de données, chez la femme enceinte ou allaitante, éviter de consommer un CA contenant une préparation à base de cette partie de plante </text:p>
          </table:table-cell>
          <table:table-cell office:value-type="string">
            <text:p>En l’absence de données, avant l’âge de 3 ans, éviter de consommer un CA contenant une préparation à base de cette partie de plante </text:p>
          </table:table-cell>
        </table:table-row>
        <table:table-row table:style-name="ro7">
          <table:table-cell table:style-name="ce2" office:value-type="string">
            <text:p>Solidago virgaurea</text:p>
          </table:table-cell>
          <table:table-cell office:value-type="string">
            <text:p>Solidage verge d'or</text:p>
          </table:table-cell>
          <table:table-cell office:value-type="string">
            <text:p>Asteraceae</text:p>
          </table:table-cell>
          <table:table-cell office:value-type="string">
            <text:p>infusion</text:p>
          </table:table-cell>
          <table:table-cell office:value-type="string">
            <text:p>diurétique, anti-inflammatoire</text:p>
          </table:table-cell>
          <table:table-cell office:value-type="string">
            <text:p>troubles urinaires</text:p>
          </table:table-cell>
          <table:table-cell office:value-type="string">
            <text:p>Sommités fleuries</text:p>
          </table:table-cell>
          <table:table-cell office:value-type="string">
            <text:p>*En cas d’insuffisance cardiaque ou rénale œdèmateuses, ne pas consommer un CA contenant une préparation à base de cette partie de plante.</text:p>
            <text:p>* En cas d'allergie croisée connue en particulier à la famille des Asteraceae, ne pas consommer un CA contenant une préparation à base de cette partie de plante.</text:p>
          </table:table-cell>
          <table:table-cell office:value-type="string">
            <text:p>En cas de traitement concomitant par des diurétiques de synthèse, ne pas consommer un CA contenant une préparation à base de cette partie de plante.</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1">
          <table:table-cell office:value-type="string">
            <text:p><text:span text:style-name="T3">Syzygium aromaticum (</text:span><text:span text:style-name="T4">L.) Merill et L.M. Perry</text:span></text:p>
          </table:table-cell>
          <table:table-cell office:value-type="string">
            <text:p>Girofle, Giroflier, Géroflier</text:p>
          </table:table-cell>
          <table:table-cell table:style-name="ce9" office:value-type="string">
            <text:p>Myrtaceae</text:p>
          </table:table-cell>
          <table:table-cell table:style-name="ce9" office:value-type="string">
            <text:p>infusion, poudre</text:p>
          </table:table-cell>
          <table:table-cell table:style-name="ce9" office:value-type="string">
            <text:p>antiseptique, analgésique</text:p>
          </table:table-cell>
          <table:table-cell table:style-name="ce9" office:value-type="string">
            <text:p>douleurs dentaires</text:p>
          </table:table-cell>
          <table:table-cell office:value-type="string">
            <text:p>Huile essentielle</text:p>
          </table:table-cell>
          <table:table-cell office:value-type="string">
            <text:p>En cas d'allergie croisée connue au baume du Pérou, ne pas consommer un CA contenant une préparation à base de cette partie de plante.</text:p>
          </table:table-cell>
          <table:table-cell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Tanacetum parthenium </text:span><text:span text:style-name="T4">(L.) Sch. Bip.</text:span></text:p>
          </table:table-cell>
          <table:table-cell office:value-type="string">
            <text:p>Grande camomille</text:p>
          </table:table-cell>
          <table:table-cell office:value-type="string">
            <text:p>Asteraceae</text:p>
          </table:table-cell>
          <table:table-cell office:value-type="string">
            <text:p>infusion</text:p>
          </table:table-cell>
          <table:table-cell office:value-type="string">
            <text:p>anti-inflammatoire</text:p>
          </table:table-cell>
          <table:table-cell office:value-type="string">
            <text:p>migraines</text:p>
          </table:table-cell>
          <table:table-cell office:value-type="string">
            <text:p>Parties aériennes</text:p>
          </table:table-cell>
          <table:table-cell office:value-type="string">
            <text:p>En cas d'allergie croisée connue, en particulier aux plantes de la famille des Asteraceae, ne pas consommer un CA contenant une préparation à base de cette partie de plante.</text:p>
          </table:table-cell>
          <table:table-cell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3">
          <table:table-cell office:value-type="string">
            <text:p><text:span text:style-name="T3">Taraxacum officinale </text:span><text:span text:style-name="T4">Web.</text:span></text:p>
          </table:table-cell>
          <table:table-cell office:value-type="string">
            <text:p>Pissenlit</text:p>
          </table:table-cell>
          <table:table-cell table:style-name="ce9" office:value-type="string">
            <text:p>Asteraceae</text:p>
          </table:table-cell>
          <table:table-cell table:style-name="ce9" office:value-type="string">
            <text:p>infusion</text:p>
          </table:table-cell>
          <table:table-cell table:style-name="ce9" office:value-type="string">
            <text:p>dépurative, diurétique</text:p>
          </table:table-cell>
          <table:table-cell table:style-name="ce9" office:value-type="string">
            <text:p>drainage hépatique</text:p>
          </table:table-cell>
          <table:table-cell office:value-type="string">
            <text:p>Racine, feuille et parties aériennes</text:p>
          </table:table-cell>
          <table:table-cell office:value-type="string">
            <text:p>* En cas d’ulcère gastro-duodénal ou d’obstructions biliaires (par exemple par des calculs biliaires), ne pas consommer un CA contenant une préparation à base de cette partie de plante.* </text:p>
            <text:p>* En cas d’insuffisance cardiaque ou rénale œdémateuses, ne pas consommer un CA contenant une préparation à base de cette partie de plante.</text:p>
            <text:p>* En cas d'allergie croisée connue, en particulier aux plantes de la famille des Asteraceae, ne pas consommer un CA contenant une préparation à base de cette partie de plante.</text:p>
          </table:table-cell>
          <table:table-cell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1">
          <table:table-cell office:value-type="string">
            <text:p><text:span text:style-name="T3">Thymus vulgaris</text:span><text:span text:style-name="T4"> L.</text:span></text:p>
          </table:table-cell>
          <table:table-cell office:value-type="string">
            <text:p>Thym commun, Thym vrai</text:p>
          </table:table-cell>
          <table:table-cell office:value-type="string">
            <text:p>Lamiaceae</text:p>
          </table:table-cell>
          <table:table-cell office:value-type="string">
            <text:p>infusion</text:p>
          </table:table-cell>
          <table:table-cell office:value-type="string">
            <text:p>antiseptique, expectorante</text:p>
          </table:table-cell>
          <table:table-cell office:value-type="string">
            <text:p>toux, infections respiratoires</text:p>
          </table:table-cell>
          <table:table-cell office:value-type="string">
            <text:p>Feuille, sommité fleurie</text:p>
          </table:table-cell>
          <table:table-cell office:value-type="string">
            <text:p>En cas d'allergie croisée connue, en particulier aux plantes de la famille des Lamiaceae, ne pas consommer un CA contenant une préparation à base de cette partie de plante.</text:p>
          </table:table-cell>
          <table:table-cell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1">
          <table:table-cell office:value-type="string">
            <text:p><text:span text:style-name="T3">Thymus zygis </text:span><text:span text:style-name="T4">L.</text:span></text:p>
          </table:table-cell>
          <table:table-cell office:value-type="string">
            <text:p>Thym d'Espagne, Thym rouge</text:p>
          </table:table-cell>
          <table:table-cell table:style-name="ce9" office:value-type="string">
            <text:p>Lamiaceae</text:p>
          </table:table-cell>
          <table:table-cell table:style-name="ce9" office:value-type="string">
            <text:p>infusion</text:p>
          </table:table-cell>
          <table:table-cell table:style-name="ce9" office:value-type="string">
            <text:p>antiseptique</text:p>
          </table:table-cell>
          <table:table-cell table:style-name="ce9" office:value-type="string">
            <text:p>affections respiratoires</text:p>
          </table:table-cell>
          <table:table-cell office:value-type="string">
            <text:p>Huile essentielle </text:p>
          </table:table-cell>
          <table:table-cell office:value-type="string">
            <text:p>En cas d'allergie croisée connue, en particulier aux plantes de la famille des Lamiaceae, ne pas consommer un CA contenant une préparation à base de cette partie de plante.</text:p>
          </table:table-cell>
          <table:table-cell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Tilia cordata </text:span><text:span text:style-name="T4">Mill.et Tilia platyphyllos Scop.</text:span></text:p>
          </table:table-cell>
          <table:table-cell office:value-type="string">
            <text:p>Tilleul à petites feuilles, Tilleul des bois, Tilleul à feuilles en cœur, Tilleul à larges feuilles</text:p>
          </table:table-cell>
          <table:table-cell office:value-type="string">
            <text:p>Malvaceae</text:p>
          </table:table-cell>
          <table:table-cell office:value-type="string">
            <text:p>infusion</text:p>
          </table:table-cell>
          <table:table-cell office:value-type="string">
            <text:p>sédative, antispasmodique</text:p>
          </table:table-cell>
          <table:table-cell office:value-type="string">
            <text:p>stress, insomnie</text:p>
          </table:table-cell>
          <table:table-cell office:value-type="string">
            <text:p>Feuille, fleur, écorce, aubier</text:p>
          </table:table-cell>
          <table:table-cell table:number-columns-repeated="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4 ans, éviter de consommer un CA contenant une préparation à base de cette partie de plante. A partir de 4 ans, respecter le type de préparation et un niveau d’exposition inférieur ou équivalent, rapportés ci-dessous .</text:p>
          </table:table-cell>
        </table:table-row>
        <table:table-row table:style-name="ro1">
          <table:table-cell office:value-type="string">
            <text:p><text:span text:style-name="T3">Trigonella foenum-graecum</text:span><text:span text:style-name="T4"> L.</text:span></text:p>
          </table:table-cell>
          <table:table-cell office:value-type="string">
            <text:p>Fénugrec</text:p>
          </table:table-cell>
          <table:table-cell table:style-name="ce9" office:value-type="string">
            <text:p>Fabaceae</text:p>
          </table:table-cell>
          <table:table-cell table:style-name="ce9" office:value-type="string">
            <text:p>graines</text:p>
          </table:table-cell>
          <table:table-cell table:style-name="ce9" office:value-type="string">
            <text:p>reconstituante, hypoglycémiante</text:p>
          </table:table-cell>
          <table:table-cell table:style-name="ce9" office:value-type="string">
            <text:p>fatigue, convalescence</text:p>
          </table:table-cell>
          <table:table-cell office:value-type="string">
            <text:p>Graine</text:p>
          </table:table-cell>
          <table:table-cell table:number-columns-repeated="2" office:value-type="string">
            <text:p>-</text:p>
          </table:table-cell>
          <table:table-cell office:value-type="string">
            <text:p>En raison des données expérimentales toxicologiques, chez la femme enceinte ou allaitante, contre-indication de consommer un CA contenant une préparation à base de cette partie de plante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Urtica dioica </text:span><text:span text:style-name="T4">L. et </text:span><text:span text:style-name="T3">Urtica urens</text:span><text:span text:style-name="T4">L.</text:span></text:p>
          </table:table-cell>
          <table:table-cell office:value-type="string">
            <text:p>Ortie dioïque, Grande ortie</text:p>
          </table:table-cell>
          <table:table-cell office:value-type="string">
            <text:p>Urticaceae</text:p>
          </table:table-cell>
          <table:table-cell office:value-type="string">
            <text:p>infusion, extrait</text:p>
          </table:table-cell>
          <table:table-cell office:value-type="string">
            <text:p>reminéralisante, dépurative</text:p>
          </table:table-cell>
          <table:table-cell office:value-type="string">
            <text:p>fatigue, carences</text:p>
          </table:table-cell>
          <table:table-cell office:value-type="string">
            <text:p>Feuille, Parties aériennes, Racine</text:p>
          </table:table-cell>
          <table:table-cell office:value-type="string">
            <text:p>En cas d’insuffisance cardiaque ou rénale œdémateuses, ne pas consommer de complément alimentaire contenant une préparation à base de cette partie de plante.</text:p>
          </table:table-cell>
          <table:table-cell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1">
          <table:table-cell office:value-type="string">
            <text:p><text:span text:style-name="T3">Vaccinium myrtillus </text:span><text:span text:style-name="T4">L.</text:span></text:p>
          </table:table-cell>
          <table:table-cell office:value-type="string">
            <text:p>Myrtille commune, Myrtillier, Baies de myrtille</text:p>
          </table:table-cell>
          <table:table-cell table:style-name="ce9" office:value-type="string">
            <text:p>Ericaceae</text:p>
          </table:table-cell>
          <table:table-cell table:style-name="ce9" office:value-type="string">
            <text:p>infusion, fruits</text:p>
          </table:table-cell>
          <table:table-cell table:style-name="ce9" office:value-type="string">
            <text:p>antioxydante, astringente</text:p>
          </table:table-cell>
          <table:table-cell table:style-name="ce9" office:value-type="string">
            <text:p>troubles circulatoires</text:p>
          </table:table-cell>
          <table:table-cell office:value-type="string">
            <text:p>Fruit frais</text:p>
          </table:table-cell>
          <table:table-cell table:number-columns-repeated="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Valeriana officinalis</text:span><text:span text:style-name="T4"> L.</text:span></text:p>
          </table:table-cell>
          <table:table-cell office:value-type="string">
            <text:p>Valériane officinale</text:p>
          </table:table-cell>
          <table:table-cell office:value-type="string">
            <text:p>Caprifoliaceae</text:p>
          </table:table-cell>
          <table:table-cell office:value-type="string">
            <text:p>infusion, extrait</text:p>
          </table:table-cell>
          <table:table-cell office:value-type="string">
            <text:p>sédative</text:p>
          </table:table-cell>
          <table:table-cell office:value-type="string">
            <text:p>insomnie</text:p>
          </table:table-cell>
          <table:table-cell office:value-type="string">
            <text:p>Organes souterrains</text:p>
          </table:table-cell>
          <table:table-cell table:number-columns-repeated="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3">
          <table:table-cell office:value-type="string">
            <text:p><text:span text:style-name="T3">Verbascum densiflorum </text:span><text:span text:style-name="T4">Bertol., Verbascum densiflorum Bertol. </text:span></text:p>
            <text:p><text:span text:style-name="T3">V. phlomoides</text:span><text:span text:style-name="T4"> L. </text:span></text:p>
            <text:p/>
          </table:table-cell>
          <table:table-cell office:value-type="string">
            <text:p>Bouillon blanc à grandes fleurs, Molène à fleurs denses, Bonhomme, Molène, Bouillon blanc à petites fleurs</text:p>
          </table:table-cell>
          <table:table-cell table:style-name="ce9" office:value-type="string">
            <text:p>Scrophulariaceae</text:p>
          </table:table-cell>
          <table:table-cell table:style-name="ce9" office:value-type="string">
            <text:p>infusion</text:p>
          </table:table-cell>
          <table:table-cell table:style-name="ce9" office:value-type="string">
            <text:p>émolliente, expectorante</text:p>
          </table:table-cell>
          <table:table-cell table:style-name="ce9" office:value-type="string">
            <text:p>toux sèche</text:p>
          </table:table-cell>
          <table:table-cell office:value-type="string">
            <text:p>Fleur, feuille</text:p>
          </table:table-cell>
          <table:table-cell table:number-columns-repeated="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2 ans, éviter de consommer un complément alimentaire contenant une préparation à base de cette partie de plante </text:p>
          </table:table-cell>
        </table:table-row>
        <table:table-row table:style-name="ro1">
          <table:table-cell office:value-type="string">
            <text:p><text:span text:style-name="T3">Viola arvensis </text:span><text:span text:style-name="T4">Murray et </text:span><text:span text:style-name="T3">Viola tricolor </text:span><text:span text:style-name="T4">L.</text:span></text:p>
          </table:table-cell>
          <table:table-cell office:value-type="string">
            <text:p>Pensée des champs</text:p>
          </table:table-cell>
          <table:table-cell office:value-type="string">
            <text:p>Violaceae</text:p>
          </table:table-cell>
          <table:table-cell office:value-type="string">
            <text:p>infusion</text:p>
          </table:table-cell>
          <table:table-cell office:value-type="string">
            <text:p>dépurative</text:p>
          </table:table-cell>
          <table:table-cell office:value-type="string">
            <text:p>affections cutanées</text:p>
          </table:table-cell>
          <table:table-cell office:value-type="string">
            <text:p>Parties aériennes</text:p>
          </table:table-cell>
          <table:table-cell office:value-type="string">
            <text:p>En cas d’allergie aux dérivés salicylés, ne pas consommer un CA contenant une préparation à base de cette partie de plante.</text:p>
          </table:table-cell>
          <table:table-cell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3">
          <table:table-cell office:value-type="string">
            <text:p><text:span text:style-name="T3">Vitex agnus-castus </text:span><text:span text:style-name="T4">L.</text:span></text:p>
          </table:table-cell>
          <table:table-cell office:value-type="string">
            <text:p>Gatillier, Agneau-chaste</text:p>
          </table:table-cell>
          <table:table-cell table:style-name="ce9" office:value-type="string">
            <text:p>Lamiaceae</text:p>
          </table:table-cell>
          <table:table-cell table:style-name="ce9" office:value-type="string">
            <text:p>extrait</text:p>
          </table:table-cell>
          <table:table-cell table:style-name="ce9" office:value-type="string">
            <text:p>hormonorégulatrice</text:p>
          </table:table-cell>
          <table:table-cell table:style-name="ce9" office:value-type="string">
            <text:p>troubles du cycle menstruel</text:p>
          </table:table-cell>
          <table:table-cell office:value-type="string">
            <text:p>Fruit</text:p>
          </table:table-cell>
          <table:table-cell office:value-type="string">
            <text:p>En cas de cancer hormono-dépendant (ou d’antécédents personnels ou familiaux de tels cancers), de tumeur hypophysaire à prolactine, ou d’antécédents de troubles hypophysaires, ne pas consommer un CA contenant une préparation à base de cette partie de plante sans l’avis d’un professionnel de santé qualifié.</text:p>
          </table:table-cell>
          <table:table-cell office:value-type="string">
            <text:p>En cas de traitement médicamenteux concomitant par agonistes ou antagonistes dopaminergiques, œstrogènes ou antioestrogènes, demander conseil à un professionnel de santé qualifié.</text:p>
          </table:table-cell>
          <table:table-cell office:value-type="string">
            <text:p>En l’absence de données, chez la femme enceinte, contre-indication de consommer un CA contenant une préparation à base de cette partie de plante.</text:p>
            <text:p>En raison des données expérimentales toxicologiques, chez la femme allaitante, contre-indication de consommer un CA contenant une préparation à base de cette partie de plante </text:p>
            <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1">
          <table:table-cell office:value-type="string">
            <text:p><text:span text:style-name="T3">Vitis vinifera </text:span><text:span text:style-name="T4">L.</text:span></text:p>
          </table:table-cell>
          <table:table-cell office:value-type="string">
            <text:p>Vigne, Vigne rouge</text:p>
          </table:table-cell>
          <table:table-cell office:value-type="string">
            <text:p>Vitaceae</text:p>
          </table:table-cell>
          <table:table-cell office:value-type="string">
            <text:p>infusion</text:p>
          </table:table-cell>
          <table:table-cell office:value-type="string">
            <text:p>veinotonique</text:p>
          </table:table-cell>
          <table:table-cell office:value-type="string">
            <text:p>insuffisance veineuse</text:p>
          </table:table-cell>
          <table:table-cell office:value-type="string">
            <text:p>Feuille, bourgeon de feuille, fruit, graine</text:p>
          </table:table-cell>
          <table:table-cell table:number-columns-repeated="2" office:value-type="string">
            <text:p>-</text:p>
          </table:table-cell>
          <table:table-cell office:value-type="string">
            <text:p>En l’absence de données chez la femme enceinte ou allaitante, éviter de consommer un complément alimentaire contenant une préparation à base de cette partie de plante</text:p>
          </table:table-cell>
          <table:table-cell office:value-type="string">
            <text:p>En l’absence de données, avant l’âge de 18 ans, éviter de consommer un CA contenant une préparation à base de cette partie de plante. Réservé à l’adulte.</text:p>
          </table:table-cell>
        </table:table-row>
        <table:table-row table:style-name="ro6">
          <table:table-cell office:value-type="string">
            <text:p><text:span text:style-name="T3">Zingiber officinale </text:span><text:span text:style-name="T4">Roscoe</text:span></text:p>
          </table:table-cell>
          <table:table-cell office:value-type="string">
            <text:p>Gingembre</text:p>
          </table:table-cell>
          <table:table-cell table:style-name="ce10" office:value-type="string">
            <text:p>Zingiberaceae</text:p>
          </table:table-cell>
          <table:table-cell table:style-name="ce10" office:value-type="string">
            <text:p>infusion, poudre</text:p>
          </table:table-cell>
          <table:table-cell table:style-name="ce10" office:value-type="string">
            <text:p>stimulante, antiémétique</text:p>
          </table:table-cell>
          <table:table-cell table:style-name="ce10" office:value-type="string">
            <text:p>nausées, digestion lente</text:p>
          </table:table-cell>
          <table:table-cell office:value-type="string">
            <text:p>Rhizome</text:p>
          </table:table-cell>
          <table:table-cell table:number-columns-repeated="2" office:value-type="string">
            <text:p>-</text:p>
          </table:table-cell>
          <table:table-cell office:value-type="string">
            <text:p>Il apparaît qu’une mise en garde chez la femme enceinte n’est pas nécessaire en l’état actuel des connaissances, pour les compléments alimentaires contenant du gingembre, dans des conditions traditionnelles d’emploi, c’est-à-dire sur de courtes périodes (1 semaine), pour les préparations usuelles.</text:p>
          </table:table-cell>
          <table:table-cell office:value-type="string">
            <text:p>En l’absence de données, avant l’âge de 18 ans, éviter de consommer un CA contenant une préparation à base de cette partie de plante. Réservé à l’adulte. </text:p>
            <text:p>A partir de 6 ans :</text:p>
            <text:p>• <text:s/>6-12 ans : 250 à 500 mg de poudre en une prise, 1 à 2 h avant le voyage.</text:p>
            <text:p/>
          </table:table-cell>
        </table:table-row>
      </table:table>
      <table:table table:name="Feuille2" table:style-name="ta1" table:print="false">
        <table:table-column table:style-name="co2" table:default-cell-style-name="Default"/>
        <table:table-row table:style-name="ro1">
          <table:table-cell/>
        </table:table-row>
      </table:table>
      <table:table table:name="Feuille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BE" style:font-name-asian="Arial Unicode MS"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1-09">09/01/2026</text:date>, <text:time>15:49: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Jaurena</meta:initial-creator>
    <meta:creation-date>2026-01-09T15:48:28</meta:creation-date>
    <dc:date>2026-01-09T15:49:14</dc:date>
    <dc:creator>Marc Jaurena</dc:creator>
    <meta:editing-duration>PT48S</meta:editing-duration>
    <meta:editing-cycles>1</meta:editing-cycles>
    <meta:document-statistic meta:table-count="3" meta:cell-count="1309" meta:object-count="0"/>
    <meta:generator>OpenOffice/4.1.3$Unix OpenOffice.org_project/413m1$Build-9783</meta:generator>
  </office:meta>
</office:document-meta>
</file>